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800000326665C0984.png" manifest:media-type="image/png"/>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0d1" officeooo:paragraph-rsid="000e50d1"/>
    </style:style>
    <style:style style:name="P2" style:family="paragraph" style:parent-style-name="Standard">
      <style:text-properties officeooo:paragraph-rsid="00181eed"/>
    </style:style>
    <style:style style:name="P3" style:family="paragraph" style:parent-style-name="Standard">
      <style:text-properties officeooo:rsid="00181eed" officeooo:paragraph-rsid="00181eed"/>
    </style:style>
    <style:style style:name="P4" style:family="paragraph" style:parent-style-name="Standard">
      <style:text-properties officeooo:rsid="00181eed" officeooo:paragraph-rsid="00262a8b"/>
    </style:style>
    <style:style style:name="P5" style:family="paragraph" style:parent-style-name="Standard">
      <style:text-properties officeooo:paragraph-rsid="000f43d9"/>
    </style:style>
    <style:style style:name="P6" style:family="paragraph" style:parent-style-name="Standard">
      <style:text-properties officeooo:rsid="00153948" officeooo:paragraph-rsid="00153948"/>
    </style:style>
    <style:style style:name="P7" style:family="paragraph" style:parent-style-name="Standard">
      <style:text-properties officeooo:rsid="00153948" officeooo:paragraph-rsid="0017d39d"/>
    </style:style>
    <style:style style:name="P8" style:family="paragraph" style:parent-style-name="Standard">
      <style:text-properties officeooo:rsid="001601dd" officeooo:paragraph-rsid="0017d39d"/>
    </style:style>
    <style:style style:name="P9" style:family="paragraph" style:parent-style-name="Standard">
      <style:text-properties style:font-name="Liberation Mono" officeooo:rsid="001601dd" officeooo:paragraph-rsid="0017d39d"/>
    </style:style>
    <style:style style:name="P10" style:family="paragraph" style:parent-style-name="Standard">
      <style:text-properties style:font-name="Liberation Mono" officeooo:rsid="001aeace" officeooo:paragraph-rsid="001aeace"/>
    </style:style>
    <style:style style:name="P11" style:family="paragraph" style:parent-style-name="Standard">
      <style:text-properties style:font-name="Liberation Mono" officeooo:rsid="001b72f3" officeooo:paragraph-rsid="001b72f3"/>
    </style:style>
    <style:style style:name="P12" style:family="paragraph" style:parent-style-name="Standard">
      <style:text-properties style:font-name="Liberation Mono" officeooo:rsid="001601dd" officeooo:paragraph-rsid="001aeace"/>
    </style:style>
    <style:style style:name="P13" style:family="paragraph" style:parent-style-name="Standard">
      <style:text-properties style:font-name="Liberation Mono" officeooo:rsid="001dc881" officeooo:paragraph-rsid="001dc881"/>
    </style:style>
    <style:style style:name="P14" style:family="paragraph" style:parent-style-name="Standard">
      <style:text-properties style:font-name="Liberation Serif" officeooo:rsid="001601dd" officeooo:paragraph-rsid="0017d39d"/>
    </style:style>
    <style:style style:name="P15" style:family="paragraph" style:parent-style-name="Standard">
      <style:text-properties officeooo:paragraph-rsid="0017d39d"/>
    </style:style>
    <style:style style:name="P16" style:family="paragraph" style:parent-style-name="Standard">
      <style:text-properties style:font-name="Liberation Serif" officeooo:rsid="0017d39d" officeooo:paragraph-rsid="0017d39d"/>
    </style:style>
    <style:style style:name="P17" style:family="paragraph" style:parent-style-name="Standard">
      <style:text-properties style:font-name="Liberation Serif" officeooo:rsid="001ab0aa" officeooo:paragraph-rsid="001ab0aa"/>
    </style:style>
    <style:style style:name="P18" style:family="paragraph" style:parent-style-name="Standard">
      <style:text-properties style:font-name="Liberation Serif" officeooo:rsid="00266184" officeooo:paragraph-rsid="00266184"/>
    </style:style>
    <style:style style:name="P19" style:family="paragraph" style:parent-style-name="Standard">
      <style:text-properties style:font-name="Liberation Serif" officeooo:rsid="00297a3a" officeooo:paragraph-rsid="00297a3a"/>
    </style:style>
    <style:style style:name="P20" style:family="paragraph" style:parent-style-name="Standard">
      <style:text-properties style:font-name="Liberation Serif" officeooo:rsid="00297a3a" officeooo:paragraph-rsid="002ace1e"/>
    </style:style>
    <style:style style:name="P21" style:family="paragraph" style:parent-style-name="Standard">
      <style:text-properties style:font-name="Liberation Serif" officeooo:rsid="00297a3a" officeooo:paragraph-rsid="0030236f"/>
    </style:style>
    <style:style style:name="P22" style:family="paragraph" style:parent-style-name="Standard">
      <style:text-properties style:font-name="Liberation Mono" officeooo:rsid="00297a3a" officeooo:paragraph-rsid="002ace1e"/>
    </style:style>
    <style:style style:name="P23" style:family="paragraph" style:parent-style-name="Standard">
      <style:text-properties style:font-name="Liberation Serif" officeooo:rsid="0031df0c" officeooo:paragraph-rsid="0031df0c"/>
    </style:style>
    <style:style style:name="P24" style:family="paragraph" style:parent-style-name="Standard">
      <style:text-properties style:font-name="Liberation Serif" officeooo:rsid="00338e1d" officeooo:paragraph-rsid="003a34f3"/>
    </style:style>
    <style:style style:name="P25" style:family="paragraph" style:parent-style-name="Standard">
      <style:text-properties style:font-name="Liberation Serif" officeooo:rsid="00338e1d" officeooo:paragraph-rsid="00338e1d"/>
    </style:style>
    <style:style style:name="P26" style:family="paragraph" style:parent-style-name="Standard">
      <style:text-properties style:font-name="Liberation Mono" officeooo:rsid="00338e1d" officeooo:paragraph-rsid="00338e1d"/>
    </style:style>
    <style:style style:name="P27" style:family="paragraph" style:parent-style-name="Standard">
      <style:text-properties style:font-name="Liberation Serif" officeooo:rsid="00389fb4" officeooo:paragraph-rsid="003abbea"/>
    </style:style>
    <style:style style:name="P28" style:family="paragraph" style:parent-style-name="Standard">
      <style:text-properties style:font-name="Liberation Serif" officeooo:rsid="003cabc6" officeooo:paragraph-rsid="003cabc6"/>
    </style:style>
    <style:style style:name="T1" style:family="text">
      <style:text-properties officeooo:rsid="001140a0"/>
    </style:style>
    <style:style style:name="T2" style:family="text">
      <style:text-properties officeooo:rsid="001f6f67"/>
    </style:style>
    <style:style style:name="T3" style:family="text">
      <style:text-properties officeooo:rsid="000f43d9"/>
    </style:style>
    <style:style style:name="T4" style:family="text">
      <style:text-properties fo:font-style="italic" officeooo:rsid="000f43d9"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fb8cf"/>
    </style:style>
    <style:style style:name="T7" style:family="text">
      <style:text-properties officeooo:rsid="001a51b2"/>
    </style:style>
    <style:style style:name="T8" style:family="text">
      <style:text-properties officeooo:rsid="000fc27d"/>
    </style:style>
    <style:style style:name="T9" style:family="text">
      <style:text-properties officeooo:rsid="00135a34"/>
    </style:style>
    <style:style style:name="T10" style:family="text">
      <style:text-properties officeooo:rsid="001484f6"/>
    </style:style>
    <style:style style:name="T11" style:family="text">
      <style:text-properties officeooo:rsid="00181eed"/>
    </style:style>
    <style:style style:name="T12" style:family="text">
      <style:text-properties officeooo:rsid="00262a8b"/>
    </style:style>
    <style:style style:name="T13" style:family="text">
      <style:text-properties officeooo:rsid="0022fa29"/>
    </style:style>
    <style:style style:name="T14" style:family="text">
      <style:text-properties officeooo:rsid="00197416"/>
    </style:style>
    <style:style style:name="T15" style:family="text">
      <style:text-properties officeooo:rsid="0024d96e"/>
    </style:style>
    <style:style style:name="T16" style:family="text">
      <style:text-properties officeooo:rsid="001601dd"/>
    </style:style>
    <style:style style:name="T17" style:family="text">
      <style:text-properties officeooo:rsid="0017d39d"/>
    </style:style>
    <style:style style:name="T18" style:family="text">
      <style:text-properties officeooo:rsid="001ab0aa"/>
    </style:style>
    <style:style style:name="T19" style:family="text">
      <style:text-properties style:font-name="Liberation Mono" officeooo:rsid="001ab0aa"/>
    </style:style>
    <style:style style:name="T20" style:family="text">
      <style:text-properties officeooo:rsid="001aeace"/>
    </style:style>
    <style:style style:name="T21" style:family="text">
      <style:text-properties style:font-name="Liberation Serif" officeooo:rsid="0017d39d"/>
    </style:style>
    <style:style style:name="T22" style:family="text">
      <style:text-properties style:font-name="Liberation Mono" officeooo:rsid="0017d39d"/>
    </style:style>
    <style:style style:name="T23" style:family="text">
      <style:text-properties style:font-name="Liberation Serif" officeooo:rsid="00180320"/>
    </style:style>
    <style:style style:name="T24" style:family="text">
      <style:text-properties style:font-name="Liberation Mono" officeooo:rsid="00180320"/>
    </style:style>
    <style:style style:name="T25" style:family="text">
      <style:text-properties style:font-name="Liberation Serif" officeooo:rsid="001bf6ff"/>
    </style:style>
    <style:style style:name="T26" style:family="text">
      <style:text-properties officeooo:rsid="001bf6ff"/>
    </style:style>
    <style:style style:name="T27" style:family="text">
      <style:text-properties officeooo:rsid="001dc881"/>
    </style:style>
    <style:style style:name="T28" style:family="text">
      <style:text-properties officeooo:rsid="002e64db"/>
    </style:style>
    <style:style style:name="T29" style:family="text">
      <style:text-properties officeooo:rsid="002160c4"/>
    </style:style>
    <style:style style:name="T30" style:family="text">
      <style:text-properties officeooo:rsid="002ace1e"/>
    </style:style>
    <style:style style:name="T31" style:family="text">
      <style:text-properties officeooo:rsid="0031df0c"/>
    </style:style>
    <style:style style:name="T32" style:family="text">
      <style:text-properties officeooo:rsid="002c6ec1"/>
    </style:style>
    <style:style style:name="T33" style:family="text">
      <style:text-properties officeooo:rsid="0033955c"/>
    </style:style>
    <style:style style:name="T34" style:family="text">
      <style:text-properties officeooo:rsid="00338e1d"/>
    </style:style>
    <style:style style:name="T35" style:family="text">
      <style:text-properties officeooo:rsid="00342f39"/>
    </style:style>
    <style:style style:name="T36" style:family="text">
      <style:text-properties officeooo:rsid="003a34f3"/>
    </style:style>
    <style:style style:name="T37" style:family="text">
      <style:text-properties officeooo:rsid="0038c7a3"/>
    </style:style>
    <style:style style:name="T38" style:family="text">
      <style:text-properties officeooo:rsid="003abbea"/>
    </style:style>
    <style:style style:name="T39" style:family="text">
      <style:text-properties officeooo:rsid="003d8cb7"/>
    </style:style>
    <style:style style:name="T40" style:family="text">
      <style:text-properties officeooo:rsid="003f5c36"/>
    </style:style>
    <style:style style:name="T41" style:family="text">
      <style:text-properties officeooo:rsid="0040f86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a </text:span>- Redesigning code for concurrent processing</text:p>
      <text:p text:style-name="P1"/>
      <text:p text:style-name="P2"><text:span text:style-name="T3">Threading is the first-party Python library that allows a developer to introduce concurrency to their software, noted to be </text:span><text:span text:style-name="T4">"</text:span><text:span text:style-name="T5">particularly useful when tasks are I/O bound</text:span><text:span text:style-name="T4">... </text:span><text:span text:style-name="T5">where much of the time is spent waiting for external resources</text:span><text:span text:style-name="T4">"</text:span><text:span text:style-name="T3"> according to the documentation. [1] Within the solution developed for this essay, there are multiple potential locations to wrap in threads</text:span><text:span text:style-name="T6">: including the audit log and </text:span><text:span text:style-name="T7">background diagram generation</text:span><text:span text:style-name="T8">, but this essay will focus primarily on the </text:span><text:span text:style-name="T9">data cleaning process </text:span><text:span text:style-name="T10">triggered when a user uploads a new CSV file</text:span><text:span text:style-name="T7"> as this is the first action in the user path</text:span><text:span text:style-name="T10">.</text:span><text:span text:style-name="T11"> </text:span></text:p>
      <text:p text:style-name="P3"/>
      <text:p text:style-name="P4">This is likely to be a major part of a user's workflow, and may be executed multiple times a day, and any performance increase here will save the user a not-insignificant amount of time<text:span text:style-name="T12">. It is not known currently how large future file uploads will be, and if these aren't supported, then large uploads will result in the software locking up while it processes large amounts of data. </text:span>Without formal profiling, it's not currently known <text:span text:style-name="T13">if this is the optimal location to target for performance improvements, as other areas of the program could apply the same threading technique listed below </text:span><text:s/>most notably data analysis <text:span text:style-name="T14">and diagram </text:span>generation<text:span text:style-name="T15">. <text:s/></text:span></text:p>
      <text:p text:style-name="P5"/>
      <text:p text:style-name="P5"><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6"> and </text:span><text:span text:style-name="T17">passing each batch into a thread running the same function. </text:span></text:p>
      <text:p text:style-name="P8"/>
      <text:p text:style-name="P8"><text:span text:style-name="T17">One suggestion is </text:span><text:span text:style-name="T18">to modify `</text:span><text:span text:style-name="T19">cleanup_enture_table()</text:span><text:span text:style-name="T18">` </text:span><text:span text:style-name="T17">as below:</text:span></text:p>
      <text:p text:style-name="P9">threads = []</text:p>
      <text:p text:style-name="P9">reports = queue.Queue()</text:p>
      <text:p text:style-name="P9">while pks:</text:p>
      <text:p text:style-name="P10"><text:tab/># build batch of rows from subset of primary keys</text:p>
      <text:p text:style-name="P9"><text:s text:c="4"/>rows = get_rows(pks[0:10])</text:p>
      <text:p text:style-name="P9"><text:s text:c="4"/>pks = pks[10:]</text:p>
      <text:p text:style-name="P9"/>
      <text:p text:style-name="P11"><text:tab/># NOTE: `cleanup_selection` now takes `reports` as an outparam</text:p>
      <text:p text:style-name="P9"><text:s text:c="4"/>threads.append(</text:p>
      <text:p text:style-name="P9"><text:s text:c="8"/>threading.Thread(</text:p>
      <text:p text:style-name="P9"><text:s text:c="12"/>target=cleanup_selecton,</text:p>
      <text:p text:style-name="P9"><text:soft-page-break/><text:s text:c="12"/>args=(conn, table_name, rows, apply=apply, reports)</text:p>
      <text:p text:style-name="P9"><text:s text:c="8"/>)</text:p>
      <text:p text:style-name="P9"><text:s text:c="4"/>)</text:p>
      <text:p text:style-name="P9"/>
      <text:p text:style-name="P12"><text:s text:c="4"/><text:span text:style-name="T20"><text:tab/># Ensure new thread is started</text:span></text:p>
      <text:p text:style-name="P12"><text:span text:style-name="T20"><text:tab/></text:span>threads[-1].start()</text:p>
      <text:p text:style-name="P9"/>
      <text:p text:style-name="P13"># Halt to wait for all threads to complete</text:p>
      <text:p text:style-name="P13">t.join() for t in threads</text:p>
      <text:p text:style-name="P9">return merge_reports(reports)</text:p>
      <text:p text:style-name="P14"/>
      <text:p text:style-name="P15"><text:span text:style-name="T21">Here, the data is split into batches of 10, each passed into a thread calling </text:span><text:span text:style-name="T22">cleanup_selection().</text:span><text:span text:style-name="T21"> A thread-safe queue [3] object collect</text:span><text:span text:style-name="T23">s</text:span><text:span text:style-name="T21"> the </text:span><text:span text:style-name="T24">CleaupReport</text:span><text:span text:style-name="T23"> returned from each function call, and a new function </text:span><text:span text:style-name="T24">merge_reports()</text:span><text:span text:style-name="T23"> (not implemented here) combines these reports into one to be returned to the caller `</text:span><text:span text:style-name="T24">upload_csv()</text:span><text:span text:style-name="T23">` as seen in Figure 1.</text:span><text:span text:style-name="T25"> One design drawback here is that `cleanup_selection()` now needs to accept the queue as an out parameter, which learncpp defines as "</text:span><text:span text:style-name="T5">A function parameter that is used only for the purpose of returning information back to the caller</text:span><text:span text:style-name="T26">" [</text:span><text:span text:style-name="T27">4], as threads don't allow access to the returned value of the function called.</text:span></text:p>
      <text:p text:style-name="P16"/>
      <text:p text:style-name="P17">Development has opted to make use of the first party Queue object as the standard library is often the most "battle tested", with over 1100 resolved issues in the <text:span text:style-name="T28">CP</text:span>ython issue tracker as of writing [<text:span text:style-name="T26">5</text:span>], compared to a custom implementation a single developer could provide. Benefits include more a more secure implementation, more portable code across different platforms, and less maintainance cost on the developer<text:span text:style-name="T29"> </text:span>[<text:span text:style-name="T26">6</text:span>]. </text:p>
      <text:p text:style-name="P17"/>
      <text:p text:style-name="P18">1b - Evaluation of GUI design</text:p>
      <text:p text:style-name="P19"/>
      <text:p text:style-name="P20">User interaction is at the forefront of the developed solution's design, utilising a number of GUI elements to provide the user with feedback and interplay with the underlying data. </text:p>
      <text:p text:style-name="P20"/>
      <text:p text:style-name="P21"><text:span text:style-name="T30">The primary element of this interface is the tabular data that intentionally takes up the majority of the window, mirroring the layout of the data stored within the backing SQLite database.</text:span><text:span text:style-name="T31"> </text:span><text:span text:style-name="T30">Each of the four tables </text:span><text:span text:style-name="T32">are emulated by using a Treeview </text:span><text:span text:style-name="T33">[7] </text:span><text:span text:style-name="T32">inside a Frame object from the base Tkinter library, and are pinned to the layout using the grid layout as seen in the code snippet below:</text:span></text:p>
      <text:p text:style-name="P20"/>
      <text:p text:style-name="P22">frame = ttk.Frame(notebook, padding=8)</text:p>
      <text:p text:style-name="P22">treeview = ttk.Treeview(frame, selectmode='extended')</text:p>
      <text:p text:style-name="P22">treeview.grid(row=0, column=0, sticky='nsew')</text:p>
      <text:p text:style-name="P22">scrollbar = ttk.Scrollbar(frame, orient='vertical', command=treeview.yview)</text:p>
      <text:p text:style-name="P22">scrollbar.grid(row=0, column=1, sticky='ns')</text:p>
      <text:p text:style-name="P22">treeview.configure(yscrollcommand=scrollbar.set)</text:p>
      <text:p text:style-name="P22">frame.columnconfigure(0, weight=1)</text:p>
      <text:p text:style-name="P22">frame.rowconfigure(0, weight=1)</text:p>
      <text:p text:style-name="P22"/>
      <text:p text:style-name="P23">As an alternative, generating various charts off of ingested data directly was under consideration, but this was determined to reduce the amount of control the user has over visible data, and charts were instead <text:span text:style-name="T34">moved</text:span> to a secondary screen<text:span text:style-name="T34"> under a button click.</text:span></text:p>
      <text:p text:style-name="P23"/>
      <text:p text:style-name="P24">The se<text:span text:style-name="T33">cond GUI element to be included is the Tkinter Notebook widget [8], visually appearing as a series of tabs above the primary tables. </text:span><text:span text:style-name="T35">This allowed the interface to not be overcrowded</text:span><text:span text:style-name="T36">,</text:span><text:span text:style-name="T35"> but still </text:span><text:soft-page-break/><text:span text:style-name="T35">display all the necessary information to the user. </text:span><text:span text:style-name="T36">This could also be considered a negative due to the inability to cross-reference between multiple views at once, but can easily be overcome as multiple instances of the application can be backed by the same database. This is potentially a source of race condition-based issues that the user should be aware of.</text:span></text:p>
      <text:p text:style-name="P25"/>
      <text:p text:style-name="P26">notebook = ttk.Notebook(outer)</text:p>
      <text:p text:style-name="P26">notebook.grid(row=1, column=0, sticky='nsew')</text:p>
      <text:p text:style-name="P25"/>
      <text:p text:style-name="P27">The notebook also uses the grid layout, attached itself to the primary window layout. The sticky parameter ensures the notebook expands with the main window, ensuring the treeviews contained within<text:span text:style-name="T37"> scale </text:span><text:span text:style-name="T38">appropriately to maximise the amount of content on screen, ensuring a wider view into the stored data and not preventing user productivity.</text:span></text:p>
      <text:p text:style-name="P27"/>
      <text:p text:style-name="P27"><draw:frame draw:style-name="fr3" draw:name="Frame2" text:anchor-type="char" svg:width="17cm" draw:z-index="2"><draw:text-box fo:min-height="8.782cm"><text:p text:style-name="Figure"><draw:frame draw:style-name="fr4" draw:name="Image2" text:anchor-type="paragraph" svg:width="17cm" style:rel-width="100%" svg:height="8.782cm" style:rel-height="scale" draw:z-index="3"><draw:image xlink:href="Pictures/100000010000061800000326665C0984.png" xlink:type="simple" xlink:show="embed" xlink:actuate="onLoad" draw:mime-type="image/png"/></draw:frame>Figure <text:sequence text:ref-name="refFigure1" text:name="Figure" text:formula="ooow:Figure+1" style:num-format="1">2</text:sequence>: Labelled interface of the provided interface</text:p></draw:text-box></draw:frame></text:p>
      <text:p text:style-name="P27"/>
      <text:p text:style-name="P28">The third GUI feature worth highlighting is how the software handles data analysis. As seen in Figure 2, a number of buttons at the top of the UI trigger <text:span text:style-name="T39">various analysis charts to open in other popup windows. This design decision allows the user to utilise their desktop environment's various features, such as split-screen or tiling, to view more data at once, and to not remove the user's view into the tabular data already displayed. This contributes similarly to the notebook above, maximising the amount of data the user can see and allowing for multiple charts and diagrams to be seen at once. </text:span><text:span text:style-name="T40">As previously raised, displaying charts in the primary window was previously in consideration, but was judged to not be effective</text:span><text:span text:style-name="T41">. However, further development could provide more charts to display, and another alternative option is to expand the main window so generated charts appear to the right of the table, keeping both halves together but decreasing the amount of control a user h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5:37:54.635757520</meta:creation-date>
    <dc:date>2026-05-01T07:47:40.030464307</dc:date>
    <meta:editing-duration>PT9H11M7S</meta:editing-duration>
    <meta:editing-cycles>37</meta:editing-cycles>
    <meta:generator>LibreOffice/25.8.6.2$Linux_X86_64 LibreOffice_project/580$Build-2</meta:generator>
    <meta:document-statistic meta:table-count="0" meta:image-count="2" meta:object-count="0" meta:page-count="3" meta:paragraph-count="44" meta:word-count="1018" meta:character-count="6566" meta:non-whitespace-character-count="5521"/>
  </office:meta>
</office:document-meta>
</file>