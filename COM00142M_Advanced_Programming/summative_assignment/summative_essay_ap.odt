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C000003E0072ADE6B.png" manifest:media-type="image/png"/>
  <manifest:file-entry manifest:full-path="Pictures/100000010000037700000262B0EA2208.png" manifest:media-type="image/png"/>
  <manifest:file-entry manifest:full-path="Pictures/100000010000032A00000186E6A03FAA.png" manifest:media-type="image/png"/>
  <manifest:file-entry manifest:full-path="Pictures/10000001000006040000091E9F12349C.png" manifest:media-type="image/png"/>
  <manifest:file-entry manifest:full-path="Pictures/100000010000061800000326665C0984.png" manifest:media-type="image/png"/>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5.006cm" style:rel-column-width="19297*"/>
    </style:style>
    <style:style style:name="Table1.B" style:family="table-column">
      <style:table-column-properties style:column-width="11.994cm" style:rel-column-width="46238*"/>
    </style:style>
    <style:style style:name="Table1.A1" style:family="table-cell">
      <style:table-cell-properties style:writing-mode="page"/>
    </style:style>
    <style:style style:name="Table1.2" style:family="table-row">
      <style:table-row-properties style:min-row-height="0.418cm"/>
    </style:style>
    <style:style style:name="P1" style:family="paragraph" style:parent-style-name="Standard">
      <style:paragraph-properties fo:text-align="center" style:justify-single-word="false"/>
      <style:text-properties fo:font-size="16pt" fo:font-weight="bold" officeooo:paragraph-rsid="0015a047"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officeooo:rsid="0017850d" officeooo:paragraph-rsid="0015a047"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8pt" fo:font-weight="bold" officeooo:paragraph-rsid="0015a047"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style:font-name="Liberation Sans" fo:font-size="16pt" fo:font-weight="bold" officeooo:paragraph-rsid="0015a047" style:font-size-asian="16pt" style:font-weight-asian="bold" style:font-size-complex="16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text-properties officeooo:rsid="0017850d" officeooo:paragraph-rsid="0017850d"/>
    </style:style>
    <style:style style:name="P7" style:family="paragraph" style:parent-style-name="Standard">
      <style:text-properties officeooo:paragraph-rsid="001aaba0"/>
    </style:style>
    <style:style style:name="P8" style:family="paragraph" style:parent-style-name="Standard">
      <style:text-properties officeooo:rsid="00181eed" officeooo:paragraph-rsid="001aaba0"/>
    </style:style>
    <style:style style:name="P9" style:family="paragraph" style:parent-style-name="Standard">
      <style:text-properties officeooo:rsid="00181eed" officeooo:paragraph-rsid="00239654"/>
    </style:style>
    <style:style style:name="P10" style:family="paragraph" style:parent-style-name="Standard">
      <style:text-properties officeooo:paragraph-rsid="00239654"/>
    </style:style>
    <style:style style:name="P11" style:family="paragraph" style:parent-style-name="Standard">
      <style:text-properties officeooo:rsid="00153948" officeooo:paragraph-rsid="001aaba0"/>
    </style:style>
    <style:style style:name="P12" style:family="paragraph" style:parent-style-name="Standard">
      <style:text-properties officeooo:rsid="00153948" officeooo:paragraph-rsid="002299fa"/>
    </style:style>
    <style:style style:name="P13" style:family="paragraph" style:parent-style-name="Standard">
      <style:text-properties officeooo:rsid="001601dd" officeooo:paragraph-rsid="001aaba0"/>
    </style:style>
    <style:style style:name="P14" style:family="paragraph" style:parent-style-name="Standard">
      <style:text-properties officeooo:rsid="001601dd" officeooo:paragraph-rsid="002299fa"/>
    </style:style>
    <style:style style:name="P15" style:family="paragraph" style:parent-style-name="Standard">
      <style:text-properties style:font-name="Liberation Mono" officeooo:rsid="001601dd" officeooo:paragraph-rsid="002299fa"/>
    </style:style>
    <style:style style:name="P16" style:family="paragraph" style:parent-style-name="Table_20_Contents">
      <style:text-properties officeooo:rsid="002299fa" officeooo:paragraph-rsid="002299fa"/>
    </style:style>
    <style:style style:name="P17" style:family="paragraph" style:parent-style-name="Table_20_Contents">
      <style:text-properties officeooo:paragraph-rsid="002299fa"/>
    </style:style>
    <style:style style:name="P18" style:family="paragraph" style:parent-style-name="Standard">
      <style:text-properties officeooo:rsid="002299fa" officeooo:paragraph-rsid="002299fa"/>
    </style:style>
    <style:style style:name="P19" style:family="paragraph" style:parent-style-name="Standard">
      <style:text-properties style:font-name="Liberation Mono" officeooo:rsid="001601dd" officeooo:paragraph-rsid="001aaba0"/>
    </style:style>
    <style:style style:name="P20" style:family="paragraph" style:parent-style-name="Standard">
      <style:text-properties style:font-name="Liberation Mono" officeooo:rsid="001aeace" officeooo:paragraph-rsid="001aaba0"/>
    </style:style>
    <style:style style:name="P21" style:family="paragraph" style:parent-style-name="Standard">
      <style:text-properties style:font-name="Liberation Mono" officeooo:rsid="001b72f3" officeooo:paragraph-rsid="001aaba0"/>
    </style:style>
    <style:style style:name="P22" style:family="paragraph" style:parent-style-name="Standard">
      <style:text-properties style:font-name="Liberation Mono" officeooo:rsid="001dc881" officeooo:paragraph-rsid="001aaba0"/>
    </style:style>
    <style:style style:name="P23" style:family="paragraph" style:parent-style-name="Standard">
      <style:text-properties style:font-name="Liberation Serif" officeooo:rsid="001601dd" officeooo:paragraph-rsid="001aaba0"/>
    </style:style>
    <style:style style:name="P24" style:family="paragraph" style:parent-style-name="Standard">
      <style:text-properties style:font-name="Liberation Serif" officeooo:rsid="0017d39d" officeooo:paragraph-rsid="001aaba0"/>
    </style:style>
    <style:style style:name="P25" style:family="paragraph" style:parent-style-name="Standard">
      <style:text-properties officeooo:paragraph-rsid="00255f18"/>
    </style:style>
    <style:style style:name="P26" style:family="paragraph" style:parent-style-name="Standard">
      <style:text-properties style:font-name="Liberation Serif" officeooo:rsid="00297a3a" officeooo:paragraph-rsid="001b84f7"/>
    </style:style>
    <style:style style:name="P27" style:family="paragraph" style:parent-style-name="Standard">
      <style:text-properties style:font-name="Liberation Mono" officeooo:rsid="00297a3a" officeooo:paragraph-rsid="001b84f7"/>
    </style:style>
    <style:style style:name="P28" style:family="paragraph" style:parent-style-name="Standard">
      <style:text-properties style:font-name="Liberation Serif" officeooo:rsid="0031df0c" officeooo:paragraph-rsid="001b84f7"/>
    </style:style>
    <style:style style:name="P29" style:family="paragraph" style:parent-style-name="Standard">
      <style:text-properties style:font-name="Liberation Serif" officeooo:rsid="00338e1d" officeooo:paragraph-rsid="001b84f7"/>
    </style:style>
    <style:style style:name="P30" style:family="paragraph" style:parent-style-name="Standard">
      <style:text-properties style:font-name="Liberation Mono" officeooo:rsid="00338e1d" officeooo:paragraph-rsid="001b84f7"/>
    </style:style>
    <style:style style:name="P31" style:family="paragraph" style:parent-style-name="Standard">
      <style:text-properties style:font-name="Liberation Serif" officeooo:rsid="00389fb4" officeooo:paragraph-rsid="001b84f7"/>
    </style:style>
    <style:style style:name="P32" style:family="paragraph" style:parent-style-name="Standard">
      <style:text-properties officeooo:rsid="003cabc6" officeooo:paragraph-rsid="0028ec92"/>
    </style:style>
    <style:style style:name="P33" style:family="paragraph" style:parent-style-name="Standard">
      <style:text-properties style:font-name="Liberation Serif" officeooo:rsid="0028ec92" officeooo:paragraph-rsid="0028ec92"/>
    </style:style>
    <style:style style:name="P34" style:family="paragraph" style:parent-style-name="Standard">
      <style:text-properties style:font-name="Liberation Serif" officeooo:rsid="002aa78c" officeooo:paragraph-rsid="002aa78c"/>
    </style:style>
    <style:style style:name="P35" style:family="paragraph" style:parent-style-name="Standard">
      <style:text-properties officeooo:rsid="00085d28" officeooo:paragraph-rsid="002d4043"/>
    </style:style>
    <style:style style:name="P36" style:family="paragraph" style:parent-style-name="Standard">
      <style:text-properties officeooo:rsid="00085d28" officeooo:paragraph-rsid="001d1f21"/>
    </style:style>
    <style:style style:name="P37" style:family="paragraph" style:parent-style-name="Standard">
      <style:text-properties officeooo:paragraph-rsid="002f13b1"/>
    </style:style>
    <style:style style:name="P38" style:family="paragraph" style:parent-style-name="Standard">
      <style:text-properties officeooo:rsid="0008979b" officeooo:paragraph-rsid="001d1f21"/>
    </style:style>
    <style:style style:name="P39" style:family="paragraph" style:parent-style-name="Standard">
      <style:text-properties officeooo:rsid="000f1f8b" officeooo:paragraph-rsid="001dfaa9"/>
    </style:style>
    <style:style style:name="P40" style:family="paragraph" style:parent-style-name="Standard">
      <style:text-properties officeooo:rsid="00111418" officeooo:paragraph-rsid="001dfaa9"/>
    </style:style>
    <style:style style:name="P41" style:family="paragraph" style:parent-style-name="Standard">
      <style:text-properties officeooo:paragraph-rsid="001dfaa9"/>
    </style:style>
    <style:style style:name="P42" style:family="paragraph" style:parent-style-name="Standard">
      <style:text-properties officeooo:rsid="001cfe3f" officeooo:paragraph-rsid="001dfaa9"/>
    </style:style>
    <style:style style:name="P43" style:family="paragraph" style:parent-style-name="Standard">
      <style:text-properties officeooo:rsid="001ef7aa" officeooo:paragraph-rsid="001dfaa9"/>
    </style:style>
    <style:style style:name="P44" style:family="paragraph" style:parent-style-name="Standard" style:list-style-name="L1">
      <style:text-properties officeooo:rsid="001ef7aa" officeooo:paragraph-rsid="001dfaa9"/>
    </style:style>
    <style:style style:name="P45" style:family="paragraph" style:parent-style-name="Standard">
      <style:text-properties officeooo:rsid="00204fa7" officeooo:paragraph-rsid="0032e855"/>
    </style:style>
    <style:style style:name="P46" style:family="paragraph" style:parent-style-name="Standard">
      <style:text-properties officeooo:rsid="00204fa7" officeooo:paragraph-rsid="001dfaa9"/>
    </style:style>
    <style:style style:name="P47" style:family="paragraph" style:parent-style-name="Standard">
      <style:text-properties officeooo:rsid="0017850d" officeooo:paragraph-rsid="001dfaa9"/>
    </style:style>
    <style:style style:name="P48" style:family="paragraph" style:parent-style-name="Standard">
      <style:text-properties officeooo:paragraph-rsid="001ec7c5"/>
    </style:style>
    <style:style style:name="P49" style:family="paragraph" style:parent-style-name="Standard">
      <style:text-properties officeooo:rsid="0021f115" officeooo:paragraph-rsid="001ec7c5"/>
    </style:style>
    <style:style style:name="P50" style:family="paragraph" style:parent-style-name="Standard">
      <style:text-properties officeooo:rsid="002543d8" officeooo:paragraph-rsid="00347131"/>
    </style:style>
    <style:style style:name="P51" style:family="paragraph" style:parent-style-name="Standard">
      <style:text-properties officeooo:rsid="002543d8" officeooo:paragraph-rsid="001ec7c5"/>
    </style:style>
    <style:style style:name="P52" style:family="paragraph" style:parent-style-name="Standard">
      <style:text-properties officeooo:rsid="00328695" officeooo:paragraph-rsid="001ec7c5"/>
    </style:style>
    <style:style style:name="P53" style:family="paragraph" style:parent-style-name="Heading_20_1">
      <style:paragraph-properties fo:break-before="page"/>
    </style:style>
    <style:style style:name="P54" style:family="paragraph" style:parent-style-name="Heading_20_1">
      <style:paragraph-properties fo:margin-left="0cm" fo:margin-right="0cm" fo:margin-top="0cm" fo:margin-bottom="0.247cm" style:contextual-spacing="false" fo:line-height="150%" fo:text-align="start" style:justify-single-word="false" fo:text-indent="0cm" style:auto-text-indent="false"/>
      <style:text-properties style:font-name="Times New Roman" fo:font-size="18pt" officeooo:rsid="00178a37"/>
    </style:style>
    <style:style style:name="P55" style:family="paragraph" style:parent-style-name="Text_20_body">
      <style:paragraph-properties fo:margin-left="0cm" fo:margin-right="0cm" fo:margin-top="0cm" fo:margin-bottom="0cm" style:contextual-spacing="false" fo:text-indent="0cm" style:auto-text-indent="false"/>
    </style:style>
    <style:style style:name="P56" style:family="paragraph" style:parent-style-name="Text_20_body">
      <style:paragraph-properties fo:margin-top="0cm" fo:margin-bottom="0cm" style:contextual-spacing="false"/>
    </style:style>
    <style:style style:name="P57" style:family="paragraph" style:parent-style-name="Text_20_body" style:list-style-name="L2">
      <style:text-properties officeooo:rsid="00178a37" officeooo:paragraph-rsid="00178a37"/>
    </style:style>
    <style:style style:name="P58" style:family="paragraph" style:parent-style-name="Text_20_body">
      <style:text-properties officeooo:rsid="00178a37" officeooo:paragraph-rsid="00178a37"/>
    </style:style>
    <style:style style:name="T1" style:family="text">
      <style:text-properties officeooo:rsid="0015a047"/>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35621e"/>
    </style:style>
    <style:style style:name="T5" style:family="text">
      <style:text-properties officeooo:rsid="000f43d9"/>
    </style:style>
    <style:style style:name="T6" style:family="text">
      <style:text-properties fo:font-style="italic" officeooo:rsid="000f43d9"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0fb8cf"/>
    </style:style>
    <style:style style:name="T9" style:family="text">
      <style:text-properties officeooo:rsid="001a51b2"/>
    </style:style>
    <style:style style:name="T10" style:family="text">
      <style:text-properties officeooo:rsid="000fc27d"/>
    </style:style>
    <style:style style:name="T11" style:family="text">
      <style:text-properties officeooo:rsid="00135a34"/>
    </style:style>
    <style:style style:name="T12" style:family="text">
      <style:text-properties officeooo:rsid="001484f6"/>
    </style:style>
    <style:style style:name="T13" style:family="text">
      <style:text-properties officeooo:rsid="00181eed"/>
    </style:style>
    <style:style style:name="T14" style:family="text">
      <style:text-properties officeooo:rsid="00262a8b"/>
    </style:style>
    <style:style style:name="T15" style:family="text">
      <style:text-properties officeooo:rsid="00239654"/>
    </style:style>
    <style:style style:name="T16" style:family="text">
      <style:text-properties officeooo:rsid="0021b4b0"/>
    </style:style>
    <style:style style:name="T17" style:family="text">
      <style:text-properties officeooo:rsid="0022fa29"/>
    </style:style>
    <style:style style:name="T18" style:family="text">
      <style:text-properties officeooo:rsid="001601dd"/>
    </style:style>
    <style:style style:name="T19" style:family="text">
      <style:text-properties officeooo:rsid="0017d39d"/>
    </style:style>
    <style:style style:name="T20" style:family="text">
      <style:text-properties officeooo:rsid="001ab0aa"/>
    </style:style>
    <style:style style:name="T21" style:family="text">
      <style:text-properties style:font-name="Liberation Mono" officeooo:rsid="001ab0aa"/>
    </style:style>
    <style:style style:name="T22" style:family="text">
      <style:text-properties style:font-name="Liberation Mono" officeooo:rsid="0021b4b0"/>
    </style:style>
    <style:style style:name="T23" style:family="text">
      <style:text-properties officeooo:rsid="002299fa"/>
    </style:style>
    <style:style style:name="T24" style:family="text">
      <style:text-properties officeooo:rsid="001aeace"/>
    </style:style>
    <style:style style:name="T25" style:family="text">
      <style:text-properties style:font-name="Liberation Serif" officeooo:rsid="0017d39d"/>
    </style:style>
    <style:style style:name="T26" style:family="text">
      <style:text-properties style:font-name="Liberation Mono" officeooo:rsid="0017d39d"/>
    </style:style>
    <style:style style:name="T27" style:family="text">
      <style:text-properties style:font-name="Liberation Mono" officeooo:rsid="00227b7d"/>
    </style:style>
    <style:style style:name="T28" style:family="text">
      <style:text-properties style:font-name="Liberation Serif" officeooo:rsid="00227b7d"/>
    </style:style>
    <style:style style:name="T29" style:family="text">
      <style:text-properties style:font-name="Liberation Serif" officeooo:rsid="00180320"/>
    </style:style>
    <style:style style:name="T30" style:family="text">
      <style:text-properties style:font-name="Liberation Mono" officeooo:rsid="00180320"/>
    </style:style>
    <style:style style:name="T31" style:family="text">
      <style:text-properties style:font-name="Liberation Serif" officeooo:rsid="001bf6ff"/>
    </style:style>
    <style:style style:name="T32" style:family="text">
      <style:text-properties style:font-name="Liberation Mono" officeooo:rsid="001bf6ff"/>
    </style:style>
    <style:style style:name="T33" style:family="text">
      <style:text-properties officeooo:rsid="001bf6ff"/>
    </style:style>
    <style:style style:name="T34" style:family="text">
      <style:text-properties officeooo:rsid="001dc881"/>
    </style:style>
    <style:style style:name="T35" style:family="text">
      <style:text-properties style:font-name="Liberation Serif" officeooo:rsid="001ab0aa"/>
    </style:style>
    <style:style style:name="T36" style:family="text">
      <style:text-properties style:font-name="Liberation Serif" officeooo:rsid="00255f18"/>
    </style:style>
    <style:style style:name="T37" style:family="text">
      <style:text-properties style:font-name="Liberation Serif" officeooo:rsid="002e64db"/>
    </style:style>
    <style:style style:name="T38" style:family="text">
      <style:text-properties style:font-name="Liberation Serif" officeooo:rsid="00257d4b"/>
    </style:style>
    <style:style style:name="T39" style:family="text">
      <style:text-properties style:font-name="Liberation Mono" officeooo:rsid="00257d4b"/>
    </style:style>
    <style:style style:name="T40" style:family="text">
      <style:text-properties officeooo:rsid="002ace1e"/>
    </style:style>
    <style:style style:name="T41" style:family="text">
      <style:text-properties officeooo:rsid="0031df0c"/>
    </style:style>
    <style:style style:name="T42" style:family="text">
      <style:text-properties officeooo:rsid="002c6ec1"/>
    </style:style>
    <style:style style:name="T43" style:family="text">
      <style:text-properties officeooo:rsid="0033955c"/>
    </style:style>
    <style:style style:name="T44" style:family="text">
      <style:text-properties officeooo:rsid="00257d4b"/>
    </style:style>
    <style:style style:name="T45" style:family="text">
      <style:text-properties officeooo:rsid="001b84f7"/>
    </style:style>
    <style:style style:name="T46" style:family="text">
      <style:text-properties officeooo:rsid="00338e1d"/>
    </style:style>
    <style:style style:name="T47" style:family="text">
      <style:text-properties officeooo:rsid="00342f39"/>
    </style:style>
    <style:style style:name="T48" style:family="text">
      <style:text-properties officeooo:rsid="003a34f3"/>
    </style:style>
    <style:style style:name="T49" style:family="text">
      <style:text-properties officeooo:rsid="0038c7a3"/>
    </style:style>
    <style:style style:name="T50" style:family="text">
      <style:text-properties officeooo:rsid="003abbea"/>
    </style:style>
    <style:style style:name="T51" style:family="text">
      <style:text-properties style:font-name="Liberation Serif"/>
    </style:style>
    <style:style style:name="T52" style:family="text">
      <style:text-properties style:font-name="Liberation Serif" officeooo:rsid="003d8cb7"/>
    </style:style>
    <style:style style:name="T53" style:family="text">
      <style:text-properties style:font-name="Liberation Serif" officeooo:rsid="003f5c36"/>
    </style:style>
    <style:style style:name="T54" style:family="text">
      <style:text-properties style:font-name="Liberation Serif" officeooo:rsid="0040f866"/>
    </style:style>
    <style:style style:name="T55" style:family="text">
      <style:text-properties style:font-name="Liberation Serif" officeooo:rsid="0028ec92"/>
    </style:style>
    <style:style style:name="T56" style:family="text">
      <style:text-properties officeooo:rsid="002d4043"/>
    </style:style>
    <style:style style:name="T57" style:family="text">
      <style:text-properties officeooo:rsid="00085d28"/>
    </style:style>
    <style:style style:name="T58" style:family="text">
      <style:text-properties fo:font-style="italic" officeooo:rsid="00085d28" style:font-style-asian="italic" style:font-style-complex="italic"/>
    </style:style>
    <style:style style:name="T59" style:family="text">
      <style:text-properties officeooo:rsid="001d1f21"/>
    </style:style>
    <style:style style:name="T60" style:family="text">
      <style:text-properties officeooo:rsid="0008979b"/>
    </style:style>
    <style:style style:name="T61" style:family="text">
      <style:text-properties officeooo:rsid="002f13b1"/>
    </style:style>
    <style:style style:name="T62" style:family="text">
      <style:text-properties officeooo:rsid="0009422c"/>
    </style:style>
    <style:style style:name="T63" style:family="text">
      <style:text-properties officeooo:rsid="00111418"/>
    </style:style>
    <style:style style:name="T64" style:family="text">
      <style:text-properties officeooo:rsid="00163351"/>
    </style:style>
    <style:style style:name="T65" style:family="text">
      <style:text-properties officeooo:rsid="00174f1f"/>
    </style:style>
    <style:style style:name="T66" style:family="text">
      <style:text-properties officeooo:rsid="001dfaa9"/>
    </style:style>
    <style:style style:name="T67" style:family="text">
      <style:text-properties officeooo:rsid="00190821"/>
    </style:style>
    <style:style style:name="T68" style:family="text">
      <style:text-properties fo:font-style="italic" officeooo:rsid="00190821" style:font-style-asian="italic" style:font-style-complex="italic"/>
    </style:style>
    <style:style style:name="T69" style:family="text">
      <style:text-properties officeooo:rsid="001acc34"/>
    </style:style>
    <style:style style:name="T70" style:family="text">
      <style:text-properties officeooo:rsid="001b45ee"/>
    </style:style>
    <style:style style:name="T71" style:family="text">
      <style:text-properties officeooo:rsid="0033ae32"/>
    </style:style>
    <style:style style:name="T72" style:family="text">
      <style:text-properties style:font-name="Liberation Mono"/>
    </style:style>
    <style:style style:name="T73" style:family="text">
      <style:text-properties officeooo:rsid="0032e855"/>
    </style:style>
    <style:style style:name="T74" style:family="text">
      <style:text-properties officeooo:rsid="001ec7c5"/>
    </style:style>
    <style:style style:name="T75" style:family="text">
      <style:text-properties officeooo:rsid="001590d9"/>
    </style:style>
    <style:style style:name="T76" style:family="text">
      <style:text-properties officeooo:rsid="0016064a"/>
    </style:style>
    <style:style style:name="T77" style:family="text">
      <style:text-properties officeooo:rsid="001917ed"/>
    </style:style>
    <style:style style:name="T78" style:family="text">
      <style:text-properties officeooo:rsid="001a8a76"/>
    </style:style>
    <style:style style:name="T79" style:family="text">
      <style:text-properties officeooo:rsid="00271782"/>
    </style:style>
    <style:style style:name="T80" style:family="text">
      <style:text-properties officeooo:rsid="00347131"/>
    </style:style>
    <style:style style:name="T81" style:family="text">
      <style:text-properties officeooo:rsid="0028066f"/>
    </style:style>
    <style:style style:name="T82" style:family="text">
      <style:text-properties officeooo:rsid="002943a5"/>
    </style:style>
    <style:style style:name="T83" style:family="text">
      <style:text-properties officeooo:rsid="002a3653"/>
    </style:style>
    <style:style style:name="T84" style:family="text">
      <style:text-properties officeooo:rsid="002b9cff"/>
    </style:style>
    <style:style style:name="T85" style:family="text">
      <style:text-properties officeooo:rsid="002cce9f"/>
    </style:style>
    <style:style style:name="T86" style:family="text">
      <style:text-properties fo:font-style="italic" officeooo:rsid="002cce9f" style:font-style-asian="italic" style:font-style-complex="italic"/>
    </style:style>
    <style:style style:name="T87" style:family="text">
      <style:text-properties fo:font-style="normal" officeooo:rsid="002cce9f" style:font-style-asian="normal" style:font-style-complex="normal"/>
    </style:style>
    <style:style style:name="T88" style:family="text">
      <style:text-properties fo:font-style="normal" officeooo:rsid="001ec7c5" style:font-style-asian="normal" style:font-style-complex="normal"/>
    </style:style>
    <style:style style:name="T89" style:family="text">
      <style:text-properties fo:font-style="normal" officeooo:rsid="00257d4b" style:font-style-asian="normal" style:font-style-complex="normal"/>
    </style:style>
    <style:style style:name="T90" style:family="text">
      <style:text-properties fo:font-style="normal" officeooo:rsid="002df0a8" style:font-style-asian="normal" style:font-style-complex="normal"/>
    </style:style>
    <style:style style:name="T91" style:family="text">
      <style:text-properties officeooo:rsid="002df0a8"/>
    </style:style>
    <style:style style:name="T92" style:family="text">
      <style:text-properties officeooo:rsid="002e7ba9"/>
    </style:style>
    <style:style style:name="T93" style:family="text">
      <style:text-properties officeooo:rsid="002f626d"/>
    </style:style>
    <style:style style:name="T94" style:family="text">
      <style:text-properties officeooo:rsid="002fd828"/>
    </style:style>
    <style:style style:name="T95" style:family="text">
      <style:text-properties officeooo:rsid="003e4dba"/>
    </style:style>
    <style:style style:name="T96" style:family="text">
      <style:text-properties officeooo:rsid="00316479"/>
    </style:style>
    <style:style style:name="T97" style:family="text">
      <style:text-properties officeooo:rsid="00328695"/>
    </style:style>
    <style:style style:name="T98" style:family="text">
      <style:text-properties officeooo:rsid="0032d238"/>
    </style:style>
    <style:style style:name="T99" style:family="text">
      <style:text-properties officeooo:rsid="00344fad"/>
    </style:style>
    <style:style style:name="T100" style:family="text">
      <style:text-properties officeooo:rsid="0035f616"/>
    </style:style>
    <style:style style:name="T101" style:family="text">
      <style:text-properties officeooo:rsid="003739f1"/>
    </style:style>
    <style:style style:name="T102" style:family="text">
      <style:text-properties officeooo:rsid="00387267"/>
    </style:style>
    <style:style style:name="T103" style:family="text">
      <style:text-properties officeooo:rsid="0039a333"/>
    </style:style>
    <style:style style:name="T104" style:family="text">
      <style:text-properties officeooo:rsid="003a7842"/>
    </style:style>
    <style:style style:name="T105" style:family="text">
      <style:text-properties officeooo:rsid="003bbed5"/>
    </style:style>
    <style:style style:name="T106" style:family="text">
      <style:text-properties officeooo:rsid="003f302d"/>
    </style:style>
    <style:style style:name="T107" style:family="text">
      <style:text-properties officeooo:rsid="003f905f"/>
    </style:style>
    <style:style style:name="T108" style:family="text">
      <style:text-properties officeooo:rsid="003ffce1"/>
    </style:style>
    <style:style style:name="T109" style:family="text">
      <style:text-properties officeooo:rsid="0040c854"/>
    </style:style>
    <style:style style:name="T110" style:family="text">
      <style:text-properties officeooo:rsid="00351a26"/>
    </style:style>
    <style:style style:name="T111"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15cm" fo:border="0.06pt solid #000000"/>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499cm" fo:margin-right="0.499cm" fo:margin-top="0cm" fo:margin-bottom="0cm" style:run-through="foreground" style:wrap="parallel"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Moderation Analytic Tool Prototyping: Concurrency, Design Review, and Ethics.</text:p>
      <text:p text:style-name="P3"/>
      <text:p text:style-name="P3">COM01<text:span text:style-name="T1">42</text:span>M<text:span text:style-name="T2"> </text:span><text:span text:style-name="T1">Advanced Programming</text:span></text:p>
      <text:p text:style-name="P4"><text:span text:style-name="T3">Word count:</text:span> <text:span text:style-name="T4">287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048_1021398620" office:name="1a. Redesigning for Concurrency" text:style-name="Index_20_Link" text:visited-style-name="Index_20_Link">1a. Redesigning for Concurrency<text:tab/>2</text:a></text:p>
          <text:p text:style-name="P5"><text:a xlink:type="simple" xlink:href="#__RefHeading___Toc3050_1021398620" office:name="1b. Evaluation of GUI design" text:style-name="Index_20_Link" text:visited-style-name="Index_20_Link">1b. Evaluation of GUI design<text:tab/>2</text:a></text:p>
          <text:p text:style-name="P5"><text:a xlink:type="simple" xlink:href="#__RefHeading___Toc3052_1021398620" office:name="2a. Data Model Design" text:style-name="Index_20_Link" text:visited-style-name="Index_20_Link">2a. Data Model Design<text:tab/>2</text:a></text:p>
          <text:p text:style-name="P5"><text:a xlink:type="simple" xlink:href="#__RefHeading___Toc3054_1021398620" office:name="2b. Graphical UI Design" text:style-name="Index_20_Link" text:visited-style-name="Index_20_Link">2b. Graphical UI Design<text:tab/>2</text:a></text:p>
          <text:p text:style-name="P5"><text:a xlink:type="simple" xlink:href="#__RefHeading___Toc3056_1021398620" office:name="3. Social Media Moderation: Reflection on Ethics and Morals" text:style-name="Index_20_Link" text:visited-style-name="Index_20_Link">3. Social Media Moderation: Reflection on Ethics and Morals<text:tab/>2</text:a></text:p>
          <text:p text:style-name="P5"><text:a xlink:type="simple" xlink:href="#__RefHeading___Toc3058_1021398620" office:name="References" text:style-name="Index_20_Link" text:visited-style-name="Index_20_Link">References<text:tab/>3</text:a></text:p>
          <text:p text:style-name="P5"><text:a xlink:type="simple" xlink:href="#__RefHeading___Toc3060_1021398620" office:name="Database Usage" text:style-name="Index_20_Link" text:visited-style-name="Index_20_Link">Database Usage<text:tab/>3</text:a></text:p>
        </text:index-body>
      </text:table-of-content>
      <text:p text:style-name="P4"/>
      <text:p text:style-name="P4"/>
      <text:h text:style-name="P6" text:outline-level="1"><text:bookmark-start text:name="__RefHeading___Toc3048_1021398620"/>1a. Redesigning for Concurrency<text:bookmark-end text:name="__RefHeading___Toc3048_1021398620"/></text:h>
      <text:p text:style-name="P7"><text:span text:style-name="T5">Threading is the first-party Python library that allows a developer to introduce concurrency to their software, noted to be </text:span><text:span text:style-name="T6">"</text:span><text:span text:style-name="T7">particularly useful when tasks are I/O bound</text:span><text:span text:style-name="T6">... </text:span><text:span text:style-name="T7">where much of the time is spent waiting for external resources</text:span><text:span text:style-name="T6">"</text:span><text:span text:style-name="T5"> according to the documentation. [1] Within the solution developed for this essay, there are multiple potential locations to wrap in threads</text:span><text:span text:style-name="T8">: including the audit log and </text:span><text:span text:style-name="T9">background diagram generation</text:span><text:span text:style-name="T10">, but this essay will focus primarily on the </text:span><text:span text:style-name="T11">data cleaning process </text:span><text:span text:style-name="T12">triggered when a user uploads a new CSV file</text:span><text:span text:style-name="T9"> as this is the first action in the user path</text:span><text:span text:style-name="T12">.</text:span><text:span text:style-name="T13"> </text:span></text:p>
      <text:p text:style-name="P8"/>
      <text:p text:style-name="P9">This is likely to be a major part of a user's work flow, and may be executed multiple times a day, and any performance increase here will save the user a not-insignificant amount of time<text:span text:style-name="T14">. It is not known currently how large future file uploads will be, and if these aren't </text:span><text:span text:style-name="T15">accounted for</text:span><text:span text:style-name="T14">, then large uploads will result in the software locking up </text:span><text:span text:style-name="T15">during processing</text:span><text:span text:style-name="T14">. </text:span>Without <text:span text:style-name="T16">utilising </text:span>formal profiling<text:span text:style-name="T16"> techniques</text:span>, it's not currently known <text:span text:style-name="T17">if this is </text:span><text:span text:style-name="T15">the largest bottleneck, or if other areas of the software would find greater benefits from applying these techniques, mist notably during diagram generation.</text:span></text:p>
      <text:p text:style-name="P10"/>
      <text:p text:style-name="P7"><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text:span text:style-name="T15">Function call flow when a file is uploaded</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s seen in Figure 1, data cleaning is<text:span text:style-name="T16"> </text:span>automatic, but the runtime is bottlenecked by this process.</text:p>
      <text:p text:style-name="P12">While the code already makes use of SQLite transactions [2] to minimise how many times changes are committed to the database, processing itself could be sped up via batching<text:span text:style-name="T18"> and </text:span><text:span text:style-name="T19">passing each batch into a thread running the same function.</text:span></text:p>
      <text:p text:style-name="P13"/>
      <text:p text:style-name="P14"><text:span text:style-name="T19">One suggestion is </text:span><text:span text:style-name="T20">to modify `</text:span><text:span text:style-name="T21">cleanup_ent</text:span><text:span text:style-name="T22">i</text:span><text:span text:style-name="T21">re_table()</text:span><text:span text:style-name="T20">`</text:span><text:span text:style-name="T23">. Wrapping the function call in timing code as below, we get the following results for each of the provided example CSV files:</text:span></text:p>
      <text:p text:style-name="P14"/>
      <text:p text:style-name="P15"><text:s text:c="8"/>import time</text:p>
      <text:p text:style-name="P15"><text:s text:c="8"/>start = time.time()</text:p>
      <text:p text:style-name="P15"><text:s text:c="8"/>cleanup_report = cleanup_entire_table(conn, imported_table_name, apply=True)</text:p>
      <text:p text:style-name="P15"><text:s text:c="8"/>print(f"Cleanup time: {(time.time() - start):.6f} secs")</text:p>
      <text:p text:style-name="P15"/>
      <text:p text:style-name="P15"/>
      <text:p text:style-name="P15"/>
      <text:p text:style-name="P15"/>
      <text:p text:style-name="P14"/>
      <table:table table:name="Table1" table:style-name="Table1">
        <table:table-column table:style-name="Table1.A"/>
        <table:table-column table:style-name="Table1.B"/>
        <text:soft-page-break/>
        <table:table-row>
          <table:table-cell table:style-name="Table1.A1" office:value-type="string">
            <text:p text:style-name="P16">CSV file</text:p>
          </table:table-cell>
          <table:table-cell table:style-name="Table1.A1" office:value-type="string">
            <text:p text:style-name="P16">Printed result</text:p>
          </table:table-cell>
        </table:table-row>
        <table:table-row table:style-name="Table1.2">
          <table:table-cell table:style-name="Table1.A1" office:value-type="string">
            <text:p text:style-name="P16">TOPICS.CSV</text:p>
          </table:table-cell>
          <table:table-cell table:style-name="Table1.A1" office:value-type="string">
            <text:p text:style-name="Table_20_Contents">Cleanup time: 0.000368 secs</text:p>
          </table:table-cell>
        </table:table-row>
        <table:table-row>
          <table:table-cell table:style-name="Table1.A1" office:value-type="string">
            <text:p text:style-name="P16">USERS.CSV</text:p>
          </table:table-cell>
          <table:table-cell table:style-name="Table1.A1" office:value-type="string">
            <text:p text:style-name="P17">Cleanup time: 0.098706 secs</text:p>
          </table:table-cell>
        </table:table-row>
        <table:table-row>
          <table:table-cell table:style-name="Table1.A1" office:value-type="string">
            <text:p text:style-name="P16">POSTS.CSV</text:p>
          </table:table-cell>
          <table:table-cell table:style-name="Table1.A1" office:value-type="string">
            <text:p text:style-name="P17">Cleanup time: 0.105300 secs</text:p>
          </table:table-cell>
        </table:table-row>
        <table:table-row>
          <table:table-cell table:style-name="Table1.A1" office:value-type="string">
            <text:p text:style-name="P16">INTERACTIONS.CSV</text:p>
          </table:table-cell>
          <table:table-cell table:style-name="Table1.A1" office:value-type="string">
            <text:p text:style-name="P17">Cleanup time: 0.297269 secs</text:p>
          </table:table-cell>
        </table:table-row>
      </table:table>
      <text:p text:style-name="P18"/>
      <text:p text:style-name="P18">This shows that almost 300 milliseconds are <text:span text:style-name="T15">taken</text:span> when a 10,000 row table is uploaded, which - if done multiple times throughout the day - will <text:span text:style-name="T15">accumulate. To offset this, the function can be adjusted for threading:</text:span></text:p>
      <text:p text:style-name="P18"/>
      <text:p text:style-name="P19">threads = []</text:p>
      <text:p text:style-name="P19">reports = queue.Queue()</text:p>
      <text:p text:style-name="P19">while pks:</text:p>
      <text:p text:style-name="P20"><text:tab/># build batch of rows from subset of primary keys</text:p>
      <text:p text:style-name="P19"><text:s text:c="4"/>rows = get_rows(pks[0:10])</text:p>
      <text:p text:style-name="P19"><text:s text:c="4"/>pks = pks[10:]</text:p>
      <text:p text:style-name="P19"/>
      <text:p text:style-name="P21"><text:tab/># NOTE: `cleanup_selection` now takes `reports` as an outparam</text:p>
      <text:p text:style-name="P19"><text:s text:c="4"/>threads.append(</text:p>
      <text:p text:style-name="P19"><text:s text:c="8"/>threading.Thread(</text:p>
      <text:p text:style-name="P19"><text:s text:c="12"/>target=cleanup_selecton,</text:p>
      <text:p text:style-name="P19"><text:s text:c="12"/>args=(conn, table_name, rows, apply=apply, reports)</text:p>
      <text:p text:style-name="P19"><text:s text:c="8"/>)</text:p>
      <text:p text:style-name="P19"><text:s text:c="4"/>)</text:p>
      <text:p text:style-name="P19"/>
      <text:p text:style-name="P19"><text:s text:c="4"/><text:span text:style-name="T24"><text:tab/># Ensure new thread is started</text:span></text:p>
      <text:p text:style-name="P19"><text:span text:style-name="T24"><text:tab/></text:span>threads[-1].start()</text:p>
      <text:p text:style-name="P19"/>
      <text:p text:style-name="P22"># Halt to wait for all threads to complete</text:p>
      <text:p text:style-name="P22">t.join() for t in threads</text:p>
      <text:p text:style-name="P19">return merge_reports(reports)</text:p>
      <text:p text:style-name="P23"/>
      <text:p text:style-name="P7"><text:span text:style-name="T25">Here, the data is split into batches of 10, each passed into a thread calling </text:span><text:span text:style-name="T26">cleanup_selection()</text:span><text:span text:style-name="T27"> </text:span><text:span text:style-name="T28">which isn't modified from the current implementation.</text:span><text:span text:style-name="T25"> A thread-safe queue [3] object collect</text:span><text:span text:style-name="T29">s</text:span><text:span text:style-name="T25"> the </text:span><text:span text:style-name="T30">Clea</text:span><text:span text:style-name="T27">n</text:span><text:span text:style-name="T30">upReport</text:span><text:span text:style-name="T29"> returned from each function call, and a new function </text:span><text:span text:style-name="T30">merge_reports()</text:span><text:span text:style-name="T29"> (not implemented here) combines these reports into one to be returned to the caller </text:span><text:span text:style-name="T30">upload_csv()</text:span><text:span text:style-name="T29"> as seen in Figure 1.</text:span><text:span text:style-name="T31"> One design drawback here is that </text:span><text:span text:style-name="T32">cleanup_selection()</text:span><text:span text:style-name="T31"> now needs to accept the queue as an out parameter, which learncpp defines as "</text:span><text:span text:style-name="T7">A function parameter that is used only for the purpose of returning information back to the caller</text:span><text:span text:style-name="T33">" [</text:span><text:span text:style-name="T34">4], as threads don't allow access to the returned value of the function called.</text:span></text:p>
      <text:p text:style-name="P24"/>
      <text:p text:style-name="P25"><text:span text:style-name="T35">Development has opted to make use of the first party Queue object </text:span><text:span text:style-name="T36">as a "</text:span><text:span text:style-name="T7">multi-producer, multi-consumer queue</text:span><text:span text:style-name="T36">"[3] </text:span><text:span text:style-name="T35">as the standard library is often </text:span><text:span text:style-name="T36">more resiliant than custom code</text:span><text:span text:style-name="T35">, with </text:span><text:span text:style-name="T28">over 100</text:span><text:span text:style-name="T35"> </text:span><text:span text:style-name="T28">closed issues </text:span><text:span text:style-name="T35">in the </text:span><text:span text:style-name="T37">CP</text:span><text:span text:style-name="T35">ython issue tracker as of writing [</text:span><text:span text:style-name="T31">5</text:span><text:span text:style-name="T35">]. </text:span><text:span text:style-name="T38">Another option available is the </text:span><text:span text:style-name="T39">heapq</text:span><text:span text:style-name="T38"> [7] first party library</text:span><text:span text:style-name="T35"> </text:span><text:span text:style-name="T38">that implements a priority queue, but without thread safety [8], this was judged to not be appropriate for the current use case. </text:span></text:p>
      <text:h text:style-name="Heading_20_1" text:outline-level="1"><text:bookmark-start text:name="__RefHeading___Toc3050_1021398620"/>1b. Evaluation of GUI design<text:bookmark-end text:name="__RefHeading___Toc3050_1021398620"/></text:h>
      <text:p text:style-name="P26">User interaction is at the forefront of the developed solution's design, utilising a number of GUI elements to provide the user with feedback and interplay with the underlying data. </text:p>
      <text:p text:style-name="P26"/>
      <text:p text:style-name="P26"><text:soft-page-break/><text:span text:style-name="T40">The primary element of this interface is the tabular data that intentionally takes up the majority of the window, mirroring the layout of the data stored within the backing SQLite database.</text:span><text:span text:style-name="T41"> </text:span><text:span text:style-name="T40">Each of the four tables </text:span><text:span text:style-name="T42">are emulated by using a Treeview </text:span><text:span text:style-name="T43">[</text:span><text:span text:style-name="T44">9</text:span><text:span text:style-name="T43">] </text:span><text:span text:style-name="T42">inside a Frame object from the base Tkinter library, and are pinned to the layout using the grid layout as seen in the code snippet below:</text:span></text:p>
      <text:p text:style-name="P26"/>
      <text:p text:style-name="P27">frame = ttk.Frame(notebook, padding=8)</text:p>
      <text:p text:style-name="P27">treeview = ttk.Treeview(frame, selectmode='extended')</text:p>
      <text:p text:style-name="P27">treeview.grid(row=0, column=0, sticky='nsew')</text:p>
      <text:p text:style-name="P27">scrollbar = ttk.Scrollbar(frame, orient='vertical', <text:span text:style-name="T45"><text:tab/></text:span>command=treeview.yview)</text:p>
      <text:p text:style-name="P27">scrollbar.grid(row=0, column=1, sticky='ns')</text:p>
      <text:p text:style-name="P27">treeview.configure(yscrollcommand=scrollbar.set)</text:p>
      <text:p text:style-name="P27">frame.columnconfigure(0, weight=1)</text:p>
      <text:p text:style-name="P27">frame.rowconfigure(0, weight=1)</text:p>
      <text:p text:style-name="P27"/>
      <text:p text:style-name="P28">As an alternative, generating various charts off of ingested data directly was under consideration, but this was determined to reduce the amount of control the user has over visible data, and charts were instead <text:span text:style-name="T46">moved</text:span> to a secondary screen<text:span text:style-name="T46"> under a button click.</text:span></text:p>
      <text:p text:style-name="P28"/>
      <text:p text:style-name="P29">The se<text:span text:style-name="T43">cond GUI element to be included is the Tkinter Notebook widget [</text:span><text:span text:style-name="T44">10</text:span><text:span text:style-name="T43">], visually appearing as a series of tabs above the primary tables. </text:span><text:span text:style-name="T47">This allowed the interface to not be overcrowded</text:span><text:span text:style-name="T48">,</text:span><text:span text:style-name="T47"> but still display all the necessary information to the user. </text:span><text:span text:style-name="T48">This could also be considered a negative due to the inability to cross-reference between multiple views at once, but can easily be overcome as multiple instances of the application can be backed by the same database. This is potentially a source of race condition-based issues that the user should be aware of.</text:span></text:p>
      <text:p text:style-name="P29"/>
      <text:p text:style-name="P30">notebook = ttk.Notebook(outer)</text:p>
      <text:p text:style-name="P30">notebook.grid(row=1, column=0, sticky='nsew')</text:p>
      <text:p text:style-name="P29"/>
      <text:p text:style-name="P31">The notebook also uses the grid layout, attached itself to the primary window layout. The sticky parameter ensures the notebook expands with the main window, ensuring the treeviews contained within<text:span text:style-name="T49"> scale </text:span><text:span text:style-name="T50">appropriately to maximise the amount of content on screen, ensuring a wider view into the stored data and not preventing user productivity.</text:span></text:p>
      <text:p text:style-name="P31"/>
      <text:p text:style-name="P31"><draw:frame draw:style-name="fr3" draw:name="Frame2" text:anchor-type="char" svg:width="17cm" draw:z-index="2"><draw:text-box fo:min-height="8.782cm"><text:p text:style-name="Figure"><draw:frame draw:style-name="fr2" draw:name="Image2" text:anchor-type="paragraph" svg:width="17cm" style:rel-width="100%" svg:height="8.782cm" style:rel-height="scale" draw:z-index="3"><draw:image xlink:href="Pictures/100000010000061800000326665C0984.png" xlink:type="simple" xlink:show="embed" xlink:actuate="onLoad" draw:mime-type="image/png"/></draw:frame>Figure <text:sequence text:ref-name="refFigure1" text:name="Figure" text:formula="ooow:Figure+1" style:num-format="1">2</text:sequence>: Labelled interface of the provided interface</text:p></draw:text-box></draw:frame><text:soft-page-break/></text:p>
      <text:p text:style-name="P31"/>
      <text:p text:style-name="P32"><text:span text:style-name="T51">The third GUI feature worth highlighting is how the software handles data analysis. As seen in Figure 2, a number of buttons at the top of the UI trigger </text:span><text:span text:style-name="T52">various analysis charts to open in other popup windows. This design decision allows the user to utilise their desktop environment's various features, such as split-screen or tiling, to view more data at once, and to not remove the user's view into the tabular data already displayed. This contributes similarly to the notebook above, maximising the amount of data the user can see and allowing for multiple charts and diagrams to be seen at once. </text:span><text:span text:style-name="T53">As previously raised, displaying charts in the primary window was previously in consideration, but was judged to not be effective</text:span><text:span text:style-name="T54">. However, </text:span><text:span text:style-name="T55">an</text:span><text:span text:style-name="T54"> alternative option is to expand the main window so generated charts appear to the right of the table, </text:span><text:span text:style-name="T55">trading view control and flexibility for a more holistic view.</text:span></text:p>
      <text:p text:style-name="P33"/>
      <text:p text:style-name="P34">One edge case that might arise is the user opening every window at once, potentially multiple times, and losing track of what is open. To prevent this, further development would use flags or a bitmask to inform the user if they try and open a window a second time, minimising the amount of cognitive overload required. This would also prevent the user from mixing up newer and older data as the viewer windows don't update when new data is uploaded. </text:p>
      <text:h text:style-name="Heading_20_1" text:outline-level="1"><text:bookmark-start text:name="__RefHeading___Toc3052_1021398620"/>2a. Data Model Design<text:bookmark-end text:name="__RefHeading___Toc3052_1021398620"/></text:h>
      <text:p text:style-name="P35">After considering multiple options for a backing data store, the solution utilised the SQLite library provided as part of the python standard library [<text:span text:style-name="T44">11</text:span>] to store its data. This format was selected as individual database tables could mirror the order of columns in the provided CSV files to ensure no information was lost when importing <text:span text:style-name="T56">data</text:span>, providing a level of <text:span text:style-name="T56">reliability</text:span> that other formats <text:span text:style-name="T56">can't provide by default due to the greater amount of pre-processing required.</text:span> </text:p>
      <text:p text:style-name="P36"/>
      <text:p text:style-name="P37"><draw:frame draw:style-name="fr4" draw:name="Frame6" text:anchor-type="paragraph" svg:x="-0.039cm" svg:y="0.146cm" svg:width="9.892cm" draw:z-index="10"><draw:text-box fo:min-height="14.991cm"><text:p text:style-name="Figure"><draw:frame draw:style-name="fr5" draw:name="Image4" text:anchor-type="paragraph" svg:width="9.589cm" style:rel-width="100%" svg:height="14.531cm" style:rel-height="scale" draw:z-index="11"><draw:image xlink:href="Pictures/10000001000006040000091E9F12349C.png" xlink:type="simple" xlink:show="embed" xlink:actuate="onLoad" draw:mime-type="image/png"/></draw:frame>Figure <text:sequence text:ref-name="refFigure5" text:name="Figure" text:formula="ooow:Figure+1" style:num-format="1">3</text:sequence>: UML diagram showing database layout</text:p></draw:text-box></draw:frame><text:soft-page-break/><text:span text:style-name="T57">SQLite was selected over in-process database formats such as mySQL or Postgress as the resulting data store is just a single file instead of relying on arcane backup options to ensure data doesn't get lost, as well as less complexity</text:span><text:span text:style-name="T56">, all of which is contained in one python file</text:span><text:span text:style-name="T57">. SQLite states on its own website that it's best suited to data analysis as "</text:span><text:span text:style-name="T58">People who understand SQL can employ the sqlite3 command-line shell... to analyze large datasets. Raw data can be imported from CSV files...</text:span><text:span text:style-name="T57">" [</text:span><text:span text:style-name="T59">10</text:span><text:span text:style-name="T57">], both of which are reasons that would benefit this applications. It's also worth noting that the database file is a binary file, suggesting the file size should be smaller than a text file such as JSON or XML. </text:span><text:span text:style-name="T60">SQlite itself advocates its usage "</text:span><text:span text:style-name="T7">as an application file format in place of XML or JSON or a "pile-of-file".</text:span><text:span text:style-name="T60">" [</text:span><text:span text:style-name="T59">1</text:span><text:span text:style-name="T44">3</text:span><text:span text:style-name="T60">][</text:span><text:span text:style-name="T59">1</text:span><text:span text:style-name="T44">4</text:span><text:span text:style-name="T60">]</text:span></text:p>
      <text:p text:style-name="P36"/>
      <text:p text:style-name="P38">Another of SQLite's strengths is the SQL query language itself. Any database admin with familiarity with any flavour of SQL can construct a query to build pivot tables or analyse data <text:span text:style-name="T61">from just the CLI with only the database file</text:span>. This can also be considered a disadvantage for two reasons; SQLite does have some quirks [<text:span text:style-name="T59">1</text:span><text:span text:style-name="T44">5</text:span><text:span text:style-name="T59">]</text:span> in its language compared to other SQL flavours, and not every data analyst is familiar with how SQL works, often relying on python knowledge or other graphical tools. The latter can be offset by the knowledge that any programmer can embed the SQLite library in a program in any language as the source code is a single file of C [<text:span text:style-name="T59">1</text:span><text:span text:style-name="T44">6</text:span>], and bindings exist for most popular languages already.</text:p>
      <text:p text:style-name="P38"/>
      <text:p text:style-name="P38">One other downside to this solution to be aware of is that this prevents any modification to the layouts of the CSV files that get uploaded external to the solution. Raw data needs to be provided in a specific format to be correctly parsed by our program and inserted into the database, which limits its flexibility compared to a JSON solution<text:span text:style-name="T62">, which could result in lost data or unexpected errors that the program needs to handle</text:span>. <text:span text:style-name="T62">Further experimentation is required to devise a solution to store additional data fields, such as dynamically adding columns to an existing table.</text:span></text:p>
      <text:h text:style-name="Heading_20_1" text:outline-level="1"><text:bookmark-start text:name="__RefHeading___Toc3054_1021398620"/>2b. Graphical UI Design<text:bookmark-end text:name="__RefHeading___Toc3054_1021398620"/></text:h>
      <text:p text:style-name="P39">The software offers the user both statistical and graph-based approaches to filtering data, allowing for a range of data to be displayed as desired. A "Calculate Stats" button shows the user a popup window with the mean<text:span text:style-name="T63"> and median calculated off of the FollowerCount field, and the "Moderation Effectiveness" button displays a number of statistics and charts, such as a topic heatmap or moderation reporting levels that can be used to verify how problematic a topic is becoming so </text:span><text:soft-page-break/><text:span text:style-name="T63">moderation staff can be better allocated and awareness of an increase in reports around a specific topic can be communicated to prepare staff for higher workloads. </text:span></text:p>
      <text:p text:style-name="P39"/>
      <text:p text:style-name="P40">These graphs and statistics are only correct at the time of correlation, and can only be calculated by the provided data. Any data not included within the provided solution won't be recognised, and this can cause a mismatch in the graphs compared to what moderators are observing, and this is a shortcoming that moderation teams should be aware of.</text:p>
      <text:p text:style-name="P40"/>
      <text:p text:style-name="P41"><text:span text:style-name="T64">For calculating statistics and handling data, the library of choice was numpy, and pandas was utilised as another method of </text:span><text:span text:style-name="T65">querying data from the database with faster performance and better handling for time-sequence data over SQLite. These were both also selected for their performance, the former being heavily written in C [</text:span><text:span text:style-name="T66">1</text:span><text:span text:style-name="T44">7</text:span><text:span text:style-name="T65">], and the latter relying on </text:span><text:span text:style-name="T67">the cython "</text:span><text:span text:style-name="T68">optimising static compiler</text:span><text:span text:style-name="T67">" [</text:span><text:span text:style-name="T66">1</text:span><text:span text:style-name="T44">8</text:span><text:span text:style-name="T67">][</text:span><text:span text:style-name="T66">1</text:span><text:span text:style-name="T44">9</text:span><text:span text:style-name="T67">] for better performance than built-in python functionality. Matplotlib was selected as the library of choice for generating charts, embedded into the GUI with a tkinter canvas extension that matplotlib provides [</text:span><text:span text:style-name="T44">20</text:span><text:span text:style-name="T67">]. This library was selected </text:span><text:span text:style-name="T69">for it's comparative levels of control and developer familiarity compared to the less well known</text:span><text:span text:style-name="T67"> </text:span><text:span text:style-name="T70">Seaborn library. Seaborn is also just a pure-python wrapper around matplotlib according to it's readme: "</text:span><text:span text:style-name="T7">Seaborn is a Python visualization library based on matplotlib</text:span><text:span text:style-name="T70">", [</text:span><text:span text:style-name="T44">2</text:span><text:span text:style-name="T70">1] which adds another level of abstractions around the actual processes happening in the codebase, reducing </text:span><text:span text:style-name="T71">deeper understanding</text:span><text:span text:style-name="T70"> </text:span><text:span text:style-name="T71">of processes </text:span><text:span text:style-name="T70">for the sake of </text:span><text:span text:style-name="T71">ease</text:span><text:span text:style-name="T70">.</text:span></text:p>
      <text:p text:style-name="P41"/>
      <text:p text:style-name="P42">Throughout the given codebase, one function drives the totality of the Moderation Effectiveness UI, `<text:span text:style-name="T72">build_moderation_effectiveness_figure()</text:span>`, which is called from from block shown in Figure <text:span text:style-name="T73">4</text:span> below. Error handling via a try-catch block is ubiquitous throughout this section of the codebase to ensure that all dependancies are present. </text:p>
      <text:p text:style-name="P42"><draw:frame draw:style-name="fr6" draw:name="Frame3" text:anchor-type="char" svg:x="0.182cm" svg:y="0.254cm" svg:width="10.818cm" draw:z-index="4"><draw:text-box fo:min-height="5.209cm"><text:p text:style-name="Figure"><draw:frame draw:style-name="fr2" draw:name="Image1 Copy 1" text:anchor-type="paragraph" svg:width="10.493cm" style:rel-width="97%" svg:height="5.052cm" style:rel-height="scale" draw:z-index="5"><draw:image xlink:href="Pictures/100000010000032A00000186E6A03FAA.png" xlink:type="simple" xlink:show="embed" xlink:actuate="onLoad" draw:mime-type="image/png"/></draw:frame>Figure <text:sequence text:ref-name="refFigure2" text:name="Figure" text:formula="ooow:Figure+1" style:num-format="1">4</text:sequence>: code snippet displaying moderation effectiveness UI trigger</text:p></draw:text-box></draw:frame>Every displayed table is then calculated and drawn within the single canvas `<text:span text:style-name="T72">mpl_canvas</text:span>`. These tables are built up individually, with one example shown in Figure <text:span text:style-name="T73">5</text:span>, that ensure that all required columns are loaded and populated correctly so as to prevent generating tables that are lacking in any reasonable data to display.</text:p>
      <text:p text:style-name="P42"/>
      <text:p text:style-name="P43">Prior to this, uploaded data had gone through the following c<draw:frame draw:style-name="fr6" draw:name="Frame4" text:anchor-type="char" svg:x="0.168cm" svg:y="1.042cm" svg:width="11.015cm" draw:z-index="6"><draw:text-box fo:min-height="7.576cm"><text:p text:style-name="Figure"><draw:frame draw:style-name="fr2" draw:name="Image2 Copy 1" text:anchor-type="paragraph" svg:width="11.015cm" style:rel-width="100%" svg:height="7.576cm" style:rel-height="scale" draw:z-index="7"><draw:image xlink:href="Pictures/100000010000037700000262B0EA2208.png" xlink:type="simple" xlink:show="embed" xlink:actuate="onLoad" draw:mime-type="image/png"/></draw:frame>Figure <text:sequence text:ref-name="refFigure3" text:name="Figure" text:formula="ooow:Figure+1" style:num-format="1">5</text:sequence>: Code snippet displaying generation of Weighted Bar chart</text:p></draw:text-box></draw:frame>leaning process:</text:p>
      <text:p text:style-name="P43"/>
      <text:list text:style-name="L1">
        <text:list-item>
          <text:p text:style-name="P44">Whitespace trimming</text:p>
        </text:list-item>
        <text:list-item>
          <text:p text:style-name="P44">Case normalisation</text:p>
        </text:list-item>
        <text:list-item>
          <text:p text:style-name="P44">Null-value standardisation.</text:p>
        </text:list-item>
        <text:list-item>
          <text:p text:style-name="P44">Date separation standardisation.</text:p>
        </text:list-item>
        <text:list-item>
          <text:p text:style-name="P44">Type coersion from SQL types to reasonable python types.</text:p>
        </text:list-item>
      </text:list>
      <text:p text:style-name="P43"/>
      <text:p text:style-name="P45"><text:soft-page-break/>Data cleaning was justified to ensure that data was in a standardised form that reduced complexity when parsing and analysing, and ensured results were calculated correctly without further tampering at the table generation stage. <text:span text:style-name="T73">One tradeoff here is the difference between a null value and a literal value 0, however these proposed changes should not cause any issues as null values can be treated as a 0 without influencing any calculated results. </text:span>A portion of the final output can be seen in Figure <text:span text:style-name="T73">6</text:span>.</text:p>
      <text:p text:style-name="P46"/>
      <text:p text:style-name="P47"><draw:frame draw:style-name="fr3" draw:name="Frame5" text:anchor-type="char" svg:width="17cm" draw:z-index="8"><draw:text-box fo:min-height="8.876cm"><text:p text:style-name="Figure"><draw:frame draw:style-name="fr2" draw:name="Image3" text:anchor-type="paragraph" svg:width="17cm" style:rel-width="100%" svg:height="8.876cm" style:rel-height="scale" draw:z-index="9"><draw:image xlink:href="Pictures/100000010000076C000003E0072ADE6B.png" xlink:type="simple" xlink:show="embed" xlink:actuate="onLoad" draw:mime-type="image/png"/></draw:frame>Figure <text:sequence text:ref-name="refFigure4" text:name="Figure" text:formula="ooow:Figure+1" style:num-format="1">6</text:sequence>: Sample screenshot from Moderation Effectiveness UI</text:p></draw:text-box></draw:frame></text:p>
      <text:h text:style-name="Heading_20_1" text:outline-level="1"><text:bookmark-start text:name="__RefHeading___Toc3056_1021398620"/>3. Social Media Moderation: Reflection on Ethics and Morals<text:bookmark-end text:name="__RefHeading___Toc3056_1021398620"/></text:h>
      <text:p text:style-name="P48">Social media usage has risen rapidly since its inception, with over 2 billion monthly active users in 2019 [<text:span text:style-name="T74">2</text:span><text:span text:style-name="T44">2</text:span>]. <text:span text:style-name="T75">To ensure these platforms comply with public safety, internal </text:span><text:span text:style-name="T76">automated </text:span><text:span text:style-name="T75">moderation tools have been deployed to maintain a minimum standard of quality</text:span><text:span text:style-name="T76">, classifying </text:span><text:span text:style-name="T77">posts using machine learning techniques trained on a "continuously refreshed pool"[</text:span><text:span text:style-name="T74">2</text:span><text:span text:style-name="T44">3</text:span><text:span text:style-name="T77">] of flagged posts. [</text:span><text:span text:style-name="T74">2</text:span><text:span text:style-name="T44">4</text:span><text:span text:style-name="T77">]</text:span><text:span text:style-name="T78"> in one case to identify hate speech. Artificial intelligence is increasingly appearing in this space [</text:span><text:span text:style-name="T74">2</text:span><text:span text:style-name="T44">5</text:span><text:span text:style-name="T78">], although public perception and trust in this technology varies across the political spectrum and familiarity. [</text:span><text:span text:style-name="T74">2</text:span><text:span text:style-name="T44">6</text:span><text:span text:style-name="T78">].</text:span></text:p>
      <text:p text:style-name="P49"/>
      <text:p text:style-name="P50">Most social media providers aren't suited to moderate content in other languages -- according to leaked Facebook files in 2021, only 9% of users spoke English, but over 87% of the budget was allocated to combating English misinformation [<text:span text:style-name="T74">2</text:span><text:span text:style-name="T44">7</text:span>]. <text:span text:style-name="T79">Users often have to resort to appeals to have their content shown, such as the case of a Portuguese breast cancer awareness charity's 2021 posts on Instagram [</text:span><text:span text:style-name="T74">2</text:span><text:span text:style-name="T44">8</text:span><text:span text:style-name="T79">], as reported by </text:span><text:span text:style-name="T80">Meta's</text:span><text:span text:style-name="T79"> oversight board [</text:span><text:span text:style-name="T74">2</text:span><text:span text:style-name="T44">9</text:span><text:span text:style-name="T79">]. An argument could be made that the big tech giants are global companies </text:span><text:span text:style-name="T81">[</text:span><text:span text:style-name="T44">30</text:span><text:span text:style-name="T81">] </text:span><text:span text:style-name="T79">and </text:span><text:span text:style-name="T81">have a global audience, but as the major players are all based out of </text:span><text:span text:style-name="T80">the United States</text:span><text:span text:style-name="T81">, and statistically their users are likely to be from North America</text:span><text:span text:style-name="T80"> or Europe</text:span><text:span text:style-name="T81"> [</text:span><text:span text:style-name="T44">31</text:span><text:span text:style-name="T81">]</text:span><text:span text:style-name="T82">, it is assumed that their interest lies with their US-centric users. These companies are all listed on the S&amp;P500, a US stock exchange [</text:span><text:span text:style-name="T74">3</text:span><text:span text:style-name="T44">2</text:span><text:span text:style-name="T82">], and it can be assumed that decisions are made to appease their shareholders and keep stock valuation high. One exception to this is China, which blocks all western social media behind its "great firewall" [</text:span><text:span text:style-name="T74">3</text:span><text:span text:style-name="T44">3</text:span><text:span text:style-name="T82">][3</text:span><text:span text:style-name="T44">4</text:span><text:span text:style-name="T82">], instead having its own </text:span><text:span text:style-name="T83">group of social media platforms moderated in line with censorship across the country [</text:span><text:span text:style-name="T74">3</text:span><text:span text:style-name="T44">5</text:span><text:span text:style-name="T83">].</text:span></text:p>
      <text:p text:style-name="P51"><text:soft-page-break/></text:p>
      <text:p text:style-name="P48"><text:span text:style-name="T84">Moderation across platforms </text:span><text:span text:style-name="T85">is often devoid of context, a claim verified by Joshua Sklar, a former Facebook content moderator, in an interview with TheMarkup: </text:span><text:span text:style-name="T7">“You’re pretty much viewing these things out of context,” Sklar said. “Say someone did a series of posts of images that spelled out a racial slur. You wouldn’t be able to tell [as a moderator].”</text:span><text:span text:style-name="T86"> </text:span><text:span text:style-name="T87">[</text:span><text:span text:style-name="T88">2</text:span><text:span text:style-name="T89">3</text:span><text:span text:style-name="T87">]. This relies on algorithms to understand the context around sensitive and complex topics</text:span><text:span text:style-name="T90">, which artificial intelligence struggles with, as pointed out by the Brennan Center for Justice: "</text:span><text:span text:style-name="T7">Meta’s automated tools time and again fail to account for context, particularly in languages other than English</text:span><text:span text:style-name="T91">." [</text:span><text:span text:style-name="T74">3</text:span><text:span text:style-name="T44">6</text:span><text:span text:style-name="T91">].</text:span><text:span text:style-name="T92"> This has led to the rise of self-censorship, most notably on TikTok. [</text:span><text:span text:style-name="T74">3</text:span><text:span text:style-name="T44">7</text:span><text:span text:style-name="T92">][</text:span><text:span text:style-name="T74">3</text:span><text:span text:style-name="T44">8</text:span><text:span text:style-name="T92">]</text:span><text:span text:style-name="T93"> For example, using the term "ghey" to mean "gay", or "unalive" to mean "dead/killed". This has disproportional</text:span><text:span text:style-name="T94">ly affected the LGBT</text:span><text:span text:style-name="T95">Q</text:span><text:span text:style-name="T94">+ community, who use self-censored terms to discuss themselves, and educators discussing topics such as World War 2 now have to speak around "the algorithm" [</text:span><text:span text:style-name="T74">3</text:span><text:span text:style-name="T44">9</text:span><text:span text:style-name="T94">]</text:span><text:span text:style-name="T96">. This can lead to individuals in this space considering themselves unwelcome on these platforms, or leaving to find more radical communities where they can express themselves.</text:span><text:span text:style-name="T97"> </text:span></text:p>
      <text:p text:style-name="P48"/>
      <text:p text:style-name="P52">In contrast, it can be argued that this isn't a new phenomenon, going back to the LeetSpeak[<text:span text:style-name="T44">40</text:span>] that emerged in the early days of internet message boards, or an internet-driven slang<text:span text:style-name="T98"> [</text:span><text:span text:style-name="T44">41</text:span><text:span text:style-name="T98">] that has evolved for that specific environment, but </text:span><text:span text:style-name="T99">we can gather that this is something new instead. </text:span><text:span text:style-name="T100">While social media moderation has been successful in shutting down more extreme views or content, </text:span><text:span text:style-name="T101">research suggests that self-censorship is on the rise, both by region [</text:span><text:span text:style-name="T74">4</text:span><text:span text:style-name="T44">2</text:span><text:span text:style-name="T101">][</text:span><text:span text:style-name="T74">4</text:span><text:span text:style-name="T44">3</text:span><text:span text:style-name="T101">] and around specific events [</text:span><text:span text:style-name="T74">4</text:span><text:span text:style-name="T44">4</text:span><text:span text:style-name="T101">]</text:span><text:span text:style-name="T102">, driven by the threat of content removal and backlash from those with extreme views on either end of the spectrum. </text:span><text:span text:style-name="T103">This phenomenon could be eased via</text:span><text:span text:style-name="T104"> more context-aware moderation tools that can reason about a topic as opposed to just parse individual words. While information about the current suite of moderation tools for Tiktok isn't public, deploying a convolutional neural network trained on up to date content [</text:span><text:span text:style-name="T74">4</text:span><text:span text:style-name="T44">5</text:span><text:span text:style-name="T104">] and material that can </text:span><text:span text:style-name="T105">represent more controversial topics, with a priority of recognising appropriate content against inappropriate content.</text:span></text:p>
      <text:p text:style-name="P52"/>
      <text:p text:style-name="P48"><text:span text:style-name="T106">With the rise of social media came those trying to abuse the system, and moderation tools soon followed</text:span><text:span text:style-name="T107">, first appearing as early as 2012 [</text:span><text:span text:style-name="T74">4</text:span><text:span text:style-name="T44">6</text:span><text:span text:style-name="T107">], and likely earlier</text:span><text:span text:style-name="T108">, but finding the right balance between content being allowed or removed is a challenging ethical question. Automated systems are inherently flawed, and this often comes back to the training data used.</text:span><text:span text:style-name="T109"> </text:span></text:p>
      <text:h text:style-name="P53" text:outline-level="1"><text:bookmark-start text:name="__RefHeading___Toc3058_1021398620"/>References<text:bookmark-end text:name="__RefHeading___Toc3058_1021398620"/></text:h>
      <text:h text:style-name="P54" text:outline-level="1">Bibliography</text:h>
      <text:p text:style-name="P55">[1]<text:span text:style-name="T110"> </text:span>Python Software Foundation, (2025, ), <text:span text:style-name="T111">threading — Thread-based parallelism — Python 3.9.0 documentation</text:span>, docs.python.org. [Online]. Available: https://docs.python.org/3/library/threading.html.</text:p>
      <text:p text:style-name="P55"/>
      <text:p text:style-name="P55">[2]<text:span text:style-name="T110"> </text:span>(2015, ), <text:span text:style-name="T111">Transaction</text:span>, Sqlite.org. [Online]. Available: https://sqlite.org/lang_transaction.html.</text:p>
      <text:p text:style-name="P55"/>
      <text:p text:style-name="P55">[3]<text:span text:style-name="T110"> </text:span>(2001, ), <text:span text:style-name="T111">queue — A synchronized queue class — Python 3.14.4 documentation</text:span>, Python.org. [Online]. Available: https://docs.python.org/3/library/queue.html.</text:p>
      <text:p text:style-name="P55"/>
      <text:p text:style-name="P55">[4]<text:span text:style-name="T110"> </text:span>Alex, (2023, July.31), <text:span text:style-name="T111">12.13 — In and out parameters – Learn C++</text:span>, Learncpp.com. [Online]. Available: https://www.learncpp.com/cpp-tutorial/in-and-out-parameters/.</text:p>
      <text:p text:style-name="P55"/>
      <text:p text:style-name="P55">[5]<text:span text:style-name="T110"> </text:span>CPython, (2025, ), <text:span text:style-name="T111">Issues · python/cpython</text:span>, GitHub. [Online]. Available: https://github.com/python/cpython/issues?q=is%3Aissue%20state%3Aclosed%20Queue.queue. [Accessed: 01 May 2026].</text:p>
      <text:p text:style-name="P55"/>
      <text:p text:style-name="P55">[6]<text:span text:style-name="T110"> </text:span>(2019, ), <text:span text:style-name="T111">The Competitive Edge: Python Standard Library vs. Custom Code</text:span>, py4u. [Online]. Available: https://www.py4u.org/python-standard-library/the-competitive-edge-python-standard-library-vs-custom-code/. [Accessed: 01 May 2026].</text:p>
      <text:p text:style-name="P55"/>
      <text:p text:style-name="P55">[7]<text:span text:style-name="T110"> </text:span><text:span text:style-name="T111">heapq — Heap queue algorithm — Python 3.14.4 documentation</text:span>, docs.python.org. [Online].<text:span text:style-name="T110"> </text:span>Available: https://docs.python.org/3/library/heapq.html.</text:p>
      <text:p text:style-name="P55"/>
      <text:p text:style-name="P55">[8]<text:span text:style-name="T110"> </text:span>derek, (2016, February.9), <text:span text:style-name="T111">Is heapq in Python thread safe?</text:span>, Stack Overflow. [Online]. Available: https://stackoverflow.com/a/35298560.</text:p>
      <text:p text:style-name="P55"/>
      <text:p text:style-name="P55">[9]<text:span text:style-name="T110"> </text:span>(2020, ), <text:span text:style-name="T111">Treeview — Tk tutorial 2020 documentation</text:span>, Readthedocs.io. [Online]. Available: https://tk-tutorial.readthedocs.io/en/latest/tree/tree.html.</text:p>
      <text:p text:style-name="P55"/>
      <text:p text:style-name="P55">[10]<text:span text:style-name="T110"> </text:span>(2026, ), <text:span text:style-name="T111">tkinter.ttk — Tk themed widgets</text:span>, Python documentation. [Online]. Available: https://docs.python.org/3/library/tkinter.ttk.html#tkinter.ttk.Notebook. [Accessed: 01 May 2026].</text:p>
      <text:p text:style-name="P55"/>
      <text:p text:style-name="P55">[11]<text:span text:style-name="T110"> </text:span>Python Software Foundation, (2024, ), <text:span text:style-name="T111">sqlite3 — DB-API 2.0 interface for SQLite databases — Python 3.8.2 documentation</text:span>, docs.python.org. [Online]. Available: https://docs.python.org/3/library/sqlite3.html.</text:p>
      <text:p text:style-name="P55"/>
      <text:p text:style-name="P55">[12]<text:span text:style-name="T110"> </text:span><text:span text:style-name="T111">Appropriate Uses For SQLite</text:span>, sqlite.org. [Online]. Available: https://sqlite.org/whentouse.html.</text:p>
      <text:p text:style-name="P55"/>
      <text:p text:style-name="P55">[13]<text:span text:style-name="T110"> </text:span><text:span text:style-name="T111">SQLite Documentation</text:span>, sqlite.org. [Online]. Available: https://sqlite.org/docs.html.</text:p>
      <text:p text:style-name="P55"/>
      <text:p text:style-name="P55"><text:soft-page-break/>[14]<text:span text:style-name="T110"> </text:span>(2026, ), <text:span text:style-name="T111">SQLite As An Application File Format</text:span>, Sqlite.org. [Online]. Available: https://sqlite.org/appfileformat.html. [Accessed: 01 May 2026].</text:p>
      <text:p text:style-name="P55"/>
      <text:p text:style-name="P55">[15]<text:span text:style-name="T110"> </text:span>(2021, ), <text:span text:style-name="T111">Quirks, Caveats, and Gotchas In SQLite</text:span>, Sqlite.org. [Online]. Available: https://sqlite.org/quirks.html. [Accessed: 01 May 2026].</text:p>
      <text:p text:style-name="P55"/>
      <text:p text:style-name="P55">[16]<text:span text:style-name="T110"> </text:span>(2021, ), <text:span text:style-name="T111">The SQLite Amalgamation</text:span>, Sqlite.org. [Online]. Available: https://sqlite.org/amalgamation.html. [Accessed: 01 May 2026].</text:p>
      <text:p text:style-name="P55"/>
      <text:p text:style-name="P55">[17]<text:span text:style-name="T110"> </text:span>NumPy, (2021, October.9), <text:span text:style-name="T111">numpy/numpy</text:span>, GitHub. [Online]. Available: https://github.com/numpy/numpy.</text:p>
      <text:p text:style-name="P55"/>
      <text:p text:style-name="P55">[18]<text:span text:style-name="T110"> </text:span><text:span text:style-name="T111">Cython: C-Extensions for Python</text:span>, cython.org. [Online]. Available: https://cython.org.</text:p>
      <text:p text:style-name="P55"/>
      <text:p text:style-name="P55">[19]<text:span text:style-name="T110"> </text:span>pandas-dev, (2019, March.11), <text:span text:style-name="T111">pandas-dev/pandas</text:span>, GitHub. [Online]. Available: https://github.com/pandas-dev/pandas.</text:p>
      <text:p text:style-name="P55"/>
      <text:p text:style-name="P55">[20]<text:span text:style-name="T110"> </text:span><text:span text:style-name="T111">Embedding in Tk — Matplotlib 3.6.0 documentation</text:span>, matplotlib.org. [Online]. Available: https://matplotlib.org/stable/gallery/user_interfaces/embedding_in_tk_sgskip.html.</text:p>
      <text:p text:style-name="P55"/>
      <text:p text:style-name="P55">[21]<text:span text:style-name="T110"> </text:span>mwaskom, (2019, September.4), <text:span text:style-name="T111">mwaskom/seaborn</text:span>, GitHub. [Online]. Available: https://github.com/mwaskom/seaborn.</text:p>
      <text:p text:style-name="P55"/>
      <text:p text:style-name="P55">[22]<text:span text:style-name="T110"> </text:span>E. Ortiz-Ospina, (2019, September.18), <text:span text:style-name="T111">The rise of social media</text:span>, Our World in Data. [Online]. Available: https://ourworldindata.org/rise-of-social-media.</text:p>
      <text:p text:style-name="P55"/>
      <text:p text:style-name="P55">[23]<text:span text:style-name="T110"> </text:span>T. Apodaca and N. Uzcátegui-Liggett, (2024, March.1), <text:span text:style-name="T111">How Automated Content Moderation Works (Even When It Doesn’t) – The Markup</text:span>, themarkup.org. [Online]. Available: https://themarkup.org/automated-censorship/2024/03/01/how-automated-content-moderation-works-even-when-it-doesnt-work.</text:p>
      <text:p text:style-name="P55"/>
      <text:p text:style-name="P55">[24]<text:span text:style-name="T110"> </text:span><text:span text:style-name="T111">Training AI to detect hate speech in the real world</text:span>, ai.facebook.com. [Online]. Available: https://ai.meta.com/blog/training-ai-to-detect-hate-speech-in-the-real-world/.</text:p>
      <text:p text:style-name="P55"/>
      <text:p text:style-name="P55">[25]<text:span text:style-name="T110"> </text:span><text:span text:style-name="T111">How Facebook uses super-efficient AI models to detect hate speech</text:span>, ai.meta.com. [Online]. Available: https://ai.meta.com/blog/how-facebook-uses-super-efficient-ai-models-to-detect-hate-speech/.</text:p>
      <text:p text:style-name="P55"/>
      <text:p text:style-name="P55">[26]<text:span text:style-name="T110"> </text:span>S. Wang, ‘Factors related to user perceptions of artificial intelligence (AI)-based content moderation<text:span text:style-name="T110"> </text:span>on social media’, <text:span text:style-name="T111">Computers in Human Behavior</text:span>, vol. 149, p. 107971, Dec. 2023[Online]. Availablehttps://www.sciencedirect.com/science/article/pii/S0747563223003229.</text:p>
      <text:p text:style-name="P55"/>
      <text:p text:style-name="P55">[27]<text:span text:style-name="T110"> </text:span>(2023, ), <text:span text:style-name="T111">How Big Tech platforms are neglecting their non-English language users</text:span>, Global Witness. [Online]. Available: https://globalwitness.org/en/campaigns/digital-threats/how-big-tech-platforms-are-neglecting-their-non-english-language-users/.</text:p>
      <text:p text:style-name="P55"/>
      <text:p text:style-name="P55"><text:soft-page-break/>[28]<text:span text:style-name="T110"> </text:span><text:span text:style-name="T111">Oversight Board | Independent Judgment. Transparency. Legitimacy.</text:span>, www.oversightboard.com. [Online]. Available: https://www.oversightboard.com/decision/IG-7THR3SI1/.</text:p>
      <text:p text:style-name="P55"/>
      <text:p text:style-name="P55">[29]<text:span text:style-name="T110"> </text:span>Oversight Board, (2024, April.25), <text:span text:style-name="T111">Our Work | Oversight Board</text:span>, Oversight Board. [Online]. Available: https://www.oversightboard.com/our-work/.</text:p>
      <text:p text:style-name="P55"/>
      <text:p text:style-name="P55">[30]<text:span text:style-name="T110"> </text:span><text:span text:style-name="T111">Facebook Office Locations</text:span>, Meta Careers. [Online]. Available: https://www.metacareers.com/locations.</text:p>
      <text:p text:style-name="P55"/>
      <text:p text:style-name="P55">[31]<text:span text:style-name="T110"> </text:span>World Population Review, (2024, ), <text:span text:style-name="T111">Social media users by country 2023</text:span>, worldpopulationreview.com. [Online]. Available: https://worldpopulationreview.com/country-rankings/social-media-users-by-country.</text:p>
      <text:p text:style-name="P55"/>
      <text:p text:style-name="P55">[32]<text:span text:style-name="T110"> </text:span>Stock Analysis, (2024, ), <text:span text:style-name="T111">A List of All Stocks in the S&amp;P 500 Index</text:span>, Stock Analysis. [Online]. Available: https://stockanalysis.com/list/sp-500-stocks/.</text:p>
      <text:p text:style-name="P55"/>
      <text:p text:style-name="P55">[33]<text:span text:style-name="T110"> </text:span>R. Clayton et al., ‘Ignoring the Great Firewall of China’, 2006[Online]. Availablehttps://www.cl.cam.ac.uk/~rnc1/ignoring.pdf.</text:p>
      <text:p text:style-name="P56"/>
      <text:p text:style-name="P55">[34]<text:span text:style-name="T110"> </text:span>Expatriate Healthcare, (2025, September.18), <text:span text:style-name="T111">What Social Media is Allowed in China? | Banned Apps &amp; Expat Life</text:span>, Expatriate Group. [Online]. Available: https://www.expatriatehealthcare.com/what-social-media-is-allowed-in-china/.</text:p>
      <text:p text:style-name="P56"/>
      <text:p text:style-name="P55">[35]<text:span text:style-name="T110"> </text:span>(2006, September.25), <text:span text:style-name="T111">Media Censorship in China | Council on Foreign Relations</text:span>, Cfr.org. [Online]. Available: https://www.cfr.org/backgrounders/media-censorship-china.</text:p>
      <text:p text:style-name="P56"/>
      <text:p text:style-name="P55">[36]<text:span text:style-name="T110"> </text:span>Oversight board, (2024, September.17), <text:span text:style-name="T111">Content Moderation in a New Era for AI and Automation | Oversight Board</text:span>, The Oversight Board. [Online]. Available: https://www.oversightboard.com/news/content-moderation-in-a-new-era-for-ai-and-automation/.</text:p>
      <text:p text:style-name="P55"/>
      <text:p text:style-name="P55">[37]<text:span text:style-name="T110"> </text:span>D. Yates, (2024, ), <text:span text:style-name="T111">How do people use self-censorship to avoid having their content suppressed on sites like TikTok? – News Bureau</text:span>, Illinois.edu. [Online]. Available: https://news.illinois.edu/how-do-people-use-self-censorship-to-avoid-having-their-content-suppressed-on-sites-like-tiktok/.</text:p>
      <text:p text:style-name="P56"/>
      <text:p text:style-name="P55">[38]<text:span text:style-name="T110"> </text:span>K. Calhoun and A. Fawcett, ‘“They Edited Out her Nip Nops”: Linguistic Innovation as Textual Censorship Avoidance on TikTok’, <text:span text:style-name="T111">Language@Internet</text:span>, vol. 21, pp. 1–30, Dec. 2023[Online]. Availablehttps://scholarworks.iu.edu/journals/index.php/li/article/view/37371/39943.</text:p>
      <text:p text:style-name="P56"/>
      <text:p text:style-name="P55">[39]<text:span text:style-name="T110"> </text:span>(2024, ), <text:span text:style-name="T111">Experiences of Censorship on TikTok Across Marginalised Identities</text:span>, Arxiv.org. [Online]. Available: https://arxiv.org/html/2407.14164v1.</text:p>
      <text:p text:style-name="P55"/>
      <text:p text:style-name="P55">[40](2020, July.28), <text:span text:style-name="T111">Leet</text:span>, Wikipedia. [Online]. Available: https://en.wikipedia.org/wiki/Leet.</text:p>
      <text:p text:style-name="P55"/>
      <text:p text:style-name="P55">[41]<text:span text:style-name="T110"> </text:span>(2026, ), <text:span text:style-name="T111">Concise Oxford Companion to the English Language</text:span>, Google Books. [Online]. Available: <text:soft-page-break/>https://books.google.co.uk/books/about/Concise_Oxford_Companion_to_the_English.html?id=QMsWFsI0YkIC&amp;redir_esc=y. [Accessed: 01 May 2026].</text:p>
      <text:p text:style-name="P55"/>
      <text:p text:style-name="P55">[42]<text:span text:style-name="T110"> </text:span>J. L. Gibson and J. L. Sutherland, ‘Keeping Your Mouth Shut: Spiraling Self-Censorship in the United States’, <text:span text:style-name="T111">Political Science Quarterly</text:span>, vol. 138, no. 3, pp. 361–376, Jan. 2023[Online]. Availablehttps://academic.oup.com/psq/article/138/3/361/7192889.</text:p>
      <text:p text:style-name="P56"/>
      <text:p text:style-name="P55">[43]<text:span text:style-name="T110"> </text:span>Sławomir Cedzyński, (2025, December.7), <text:span text:style-name="T111">Self-Censorship and Rising Censorship in Europe: Why?</text:span>, Holistic News. [Online]. Available: https://holistic.news/en/self-censorship-and-rising-censorship-in-europe/. [Accessed: 01 May 2026].</text:p>
      <text:p text:style-name="P56"/>
      <text:p text:style-name="P55">[44]<text:span text:style-name="T110"> </text:span>(2024, July.12), <text:span text:style-name="T111">Surveys reveal rising student and faculty concern about censorship, self-censorship post-October 7</text:span>, The Foundation for Individual Rights and Expression. [Online]. Available: https://www.fire.org/news/surveys-reveal-rising-student-and-faculty-concern-about-censorship-self-censorship-post. [Accessed: 01 May 2026].</text:p>
      <text:p text:style-name="P56"/>
      <text:p text:style-name="P55">[45]<text:span text:style-name="T110"> </text:span>P. Arya et al., ‘MSCMGTB: A Novel Approach for Multimodal Social Media Content Moderation Using Hybrid Graph Theory &amp; Bio-inspired Optimization’, <text:span text:style-name="T111">IEEE Access</text:span>, vol. 12, pp. 73700–73718, Jan. 2024 [Online]. Available: https://doi.org/10.1109/access.2024.3400815 [Accessed: 2 December 2024].</text:p>
      <text:p text:style-name="P56"/>
      <text:p text:style-name="P55">[46]<text:span text:style-name="T110"> </text:span>A. Fox, (2019, ), <text:span text:style-name="T111">The Evolution of Content Moderation Rules Throughout The Years - Checkstep</text:span>, Checkstep. [Online]. Available: https://www.checkstep.com/the-evolution-of-content-moderation-rules-throughout-the-years.</text:p>
      <text:h text:style-name="Heading_20_1" text:outline-level="1"><text:bookmark-start text:name="__RefHeading___Toc3060_1021398620"/>Database Usage<text:bookmark-end text:name="__RefHeading___Toc3060_1021398620"/></text:h>
      <text:list text:style-name="L2">
        <text:list-item>
          <text:p text:style-name="P57">Database used: SQLite, shipped as part of the python standard library</text:p>
        </text:list-item>
        <text:list-item>
          <text:p text:style-name="P57">Version no: Python 3.14.4</text:p>
        </text:list-item>
        <text:list-item>
          <text:p text:style-name="P57">Database population file: database.py. Note, this software will automatically verify if a current database exists and create and generate relevant tables if needed on launching main.py. No other work is required</text:p>
        </text:list-item>
        <text:list-item>
          <text:p text:style-name="P57">As this is SQLite, no localhost is needed. The database generated is in the file `<text:span text:style-name="T72">app.db</text:span>`,<text:span text:style-name="T23"> defined in ui.py line 41.</text:span> <text:span text:style-name="T23">This file is </text:span>expected to be found in the same location as where the user is launching the software from.</text:p>
        </text:list-item>
      </text:lis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78a3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5:30:58.940724499</meta:creation-date>
    <dc:date>2026-05-03T13:13:50.284659376</dc:date>
    <meta:editing-duration>PT3H21M</meta:editing-duration>
    <meta:editing-cycles>20</meta:editing-cycles>
    <meta:generator>LibreOffice/25.8.6.2$Linux_X86_64 LibreOffice_project/580$Build-2</meta:generator>
    <meta:document-statistic meta:table-count="1" meta:image-count="6" meta:object-count="0" meta:page-count="13" meta:paragraph-count="153" meta:word-count="3851" meta:character-count="27803" meta:non-whitespace-character-count="23996"/>
  </office:meta>
</office:document-meta>
</file>